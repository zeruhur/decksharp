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Text_20_body" style:list-style-name="L8">
      <style:paragraph-properties fo:margin-top="0in" fo:margin-bottom="0in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Text_20_body" style:list-style-name="L1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21845*"/>
    </style:style>
    <style:style style:name="Table4.B" style:family="table-column">
      <style:table-column-properties style:rel-column-width="21845*"/>
    </style:style>
    <style:style style:name="Table4.C" style:family="table-column">
      <style:table-column-properties style:rel-column-width="21845*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</office:automatic-styles>
  <office:body>
    <office:text>
      <text:p text:style-name="Title">Specifiche DECK#</text:p>
      <text:p text:style-name="Subtitle">Sistema di annotazione stratificata per mazzo di carte standard</text:p>
      <text:p text:style-name="Author">Roberto Bisceglie</text:p>
      <text:p text:style-name="Date">2026-07-01</text:p>
      <text:table-of-content>
        <text:table-of-content-source text:outline-level="3">
          <text:index-title-template text:style-name="Contents_20_Heading">I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7.0 · status: draft</text:p>
      <text:h text:style-name="Heading_20_2" text:outline-level="2"><text:bookmark-start text:name="natura-e-scope-del-sistema"/>1. Natura e scope del sistema<text:bookmark-end text:name="natura-e-scope-del-sistema"/></text:h>
      <text:p text:style-name="First_20_paragraph">DECK# è un protocollo di annotazione stratificata su un mazzo di carte standard (52 + 2 Jolly).</text:p>
      <text:p text:style-name="Text_20_body">Il suo scopo è permettere a chiunque di costruire e giocare giochi da tavolo complessi usando materiali reperibili ovunque e a costo minimo: un mazzo di carte francesi e due pennarelli permanenti. Nessun componente proprietario, nessun materiale dedicato, nessuna dipendenza da editori o produttori specifici.</text:p>
      <text:p text:style-name="Text_20_body">DECK# è ispirato al <text:span text:style-name="T1">Piecepack</text:span> — sistema di componenti aperti per giochi da tavolo ideato da James Kyle nel 2000 — di cui condivide la filosofia: un substrato standardizzato e aperto su cui la comunità costruisce giochi liberamente. Come il Piecepack, DECK# è open source.</text:p>
      <text:p text:style-name="Text_20_body">DECK# <text:span text:style-name="T1">non è</text:span> un mazzo universale. Non prescrive giochi, meccaniche, semantiche di gioco, né generi. È un sistema aperto: definisce un vocabolario grafico condiviso e una struttura fisica di annotazione. I giochi costruiti su DECK# usano questo vocabolario e ne assegnano i significati.</text:p>
      <text:p text:style-name="Text_20_body">Il mazzo standard porta con sé tre assi informativi preesistenti che DECK# riconosce come <text:span text:style-name="T1">attivi e intoccabili</text:span>. L’annotazione aggiunge informazioni che la carta non possiede; non sostituisce quelle che già ha.</text:p>
      <text:p text:style-name="Text_20_body">DECK# è agnostico alla lingua. L’intero vocabolario grafico è composto da glifi geometrici e cifre arabiche. Nessun testo è necessario o ammesso nelle annotazioni.</text:p>
      <text:h text:style-name="Heading_20_3" text:outline-level="3"><text:bookmark-start text:name="fuori-scope"/>Fuori scope<text:bookmark-end text:name="fuori-scope"/></text:h>
      <text:p text:style-name="First_20_paragraph">I seguenti elementi sono esplicitamente fuori scope e delegati ai singoli giochi:</text:p>
      <text:list text:style-name="L1">
        <text:list-item>
          <text:p text:style-name="P1">Il significato dei semi</text:p>
        </text:list-item>
        <text:list-item>
          <text:p text:style-name="P1">Il significato del colore rosso/nero degli assi ereditati</text:p>
        </text:list-item>
        <text:list-item>
          <text:p text:style-name="P1">Il significato dei valori numerici</text:p>
        </text:list-item>
        <text:list-item>
          <text:p text:style-name="P1">Il significato di ogni glifo (il vocabolario è condiviso, la semantica no)</text:p>
        </text:list-item>
        <text:list-item>
          <text:p text:style-name="P1">La mappatura valore → funzione meccanica (es. A-6 = spazio, 7-10 = risorsa)</text:p>
        </text:list-item>
        <text:list-item>
          <text:p text:style-name="P1">Regole di movimento e topologia della griglia</text:p>
        </text:list-item>
        <text:list-item>
          <text:p text:style-name="P1">Meccaniche di risoluzione, combattimento, interazione</text:p>
        </text:list-item>
        <text:list-item>
          <text:p text:style-name="P1">Meccaniche di economia e risorse</text:p>
        </text:list-item>
        <text:list-item>
          <text:p text:style-name="P1">Condizioni di attivazione delle wildcard</text:p>
        </text:list-item>
        <text:list-item>
          <text:p text:style-name="P1">Condizioni di vittoria e obiettivi di scenario</text:p>
        </text:list-item>
        <text:list-item>
          <text:p text:style-name="P1">Meccaniche oracolari per gioco solitario o cooperativo</text:p>
        </text:list-item>
        <text:list-item>
          <text:p text:style-name="P1">Quante carte vengono usate</text:p>
        </text:list-item>
        <text:list-item>
          <text:p text:style-name="P1">Come vengono distribuite le carte</text:p>
        </text:list-item>
        <text:list-item>
          <text:p text:style-name="P1">Il numero di giocatori</text:p>
        </text:list-item>
      </text:list>
      <text:h text:style-name="Heading_20_2" text:outline-level="2"><text:bookmark-start text:name="principi-di-design"/>2. Principi di design<text:bookmark-end text:name="principi-di-design"/></text:h>
      <text:list text:style-name="L2">
        <text:list-item>
          <text:p text:style-name="P2"><text:span text:style-name="T1">Accessibilità materiale:</text:span> l’unico requisito fisico è un mazzo di carte francesi standard e due pennarelli permanenti (nero e rosso). Materiali disponibili ovunque, senza componenti proprietari o dedicati.</text:p>
        </text:list-item>
        <text:list-item>
          <text:p text:style-name="P2"><text:span text:style-name="T1">Additivo, non distruttivo:</text:span> le annotazioni aggiungono informazioni strutturali senza sovrascrivere il substrato ereditato.</text:p>
        </text:list-item>
        <text:list-item>
          <text:p text:style-name="P2"><text:span text:style-name="T1">Agnostico alla lingua:</text:span> nessun testo o lettera. Solo glifi geometrici e cifre arabiche.</text:p>
        </text:list-item>
        <text:list-item>
          <text:p text:style-name="P2"><text:span text:style-name="T1">Vincolo cromatico:</text:span> solo pennarello nero e rosso.</text:p>
        </text:list-item>
        <text:list-item>
          <text:p text:style-name="P2"><text:span text:style-name="T1">Uso duale:</text:span> le carte sono valide sia come informazione nascosta in mano sia come componenti fisici sul tavolo.</text:p>
        </text:list-item>
        <text:list-item>
          <text:p text:style-name="P2"><text:span text:style-name="T1">Dorso riservato ai marcatori di quadrante:</text:span> il dorso delle 52 carte regolari riceve esclusivamente i marcatori di quadrante — identici su tutte le carte, quindi privi di informazione differenziale. Nessun’altra annotazione sul dorso. L’uniformità preserva l’anonimità delle carte coperte.</text:p>
        </text:list-item>
        <text:list-item>
          <text:p text:style-name="P2"><text:span text:style-name="T1">Artefatto completo:</text:span> il mazzo DECK# è annotato integralmente prima di qualsiasi sessione di gioco. L’annotazione strutturale è permanente e fissa. Gli stati variabili si tracciano con token fisici, non con annotazioni.</text:p>
        </text:list-item>
      </text:list>
      <text:h text:style-name="Heading_20_2" text:outline-level="2"><text:bookmark-start text:name="il-substrato-ereditato"/>3. Il substrato ereditato<text:bookmark-end text:name="il-substrato-ereditato"/></text:h>
      <text:h text:style-name="Heading_20_3" text:outline-level="3"><text:bookmark-start text:name="i-tre-assi"/>3.1 I tre assi<text:bookmark-end text:name="i-tre-assi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sse</text:p>
            </table:table-cell>
            <table:table-cell table:style-name="TableHeaderRowCell" office:value-type="string">
              <text:p text:style-name="Table_20_Heading">Valori</text:p>
            </table:table-cell>
            <table:table-cell table:style-name="TableHeaderRowCell" office:value-type="string">
              <text:p text:style-name="Table_20_Heading">Natura</text:p>
            </table:table-cell>
          </table:table-row>
        </table:table-header-rows>
        <table:table-row>
          <table:table-cell table:style-name="TableRowCell" office:value-type="string">
            <text:p text:style-name="Table_20_Contents">Colore</text:p>
          </table:table-cell>
          <table:table-cell table:style-name="TableRowCell" office:value-type="string">
            <text:p text:style-name="Table_20_Contents">Rosso / Nero</text:p>
          </table:table-cell>
          <table:table-cell table:style-name="TableRowCell" office:value-type="string">
            <text:p text:style-name="Table_20_Contents">Binario</text:p>
          </table:table-cell>
        </table:table-row>
        <table:table-row>
          <table:table-cell table:style-name="TableRowCell" office:value-type="string">
            <text:p text:style-name="Table_20_Contents">Polarità del seme</text:p>
          </table:table-cell>
          <table:table-cell table:style-name="TableRowCell" office:value-type="string">
            <text:p text:style-name="Table_20_Contents">Cuori vs Quadri (rosso) — Fiori vs Picche (nero)</text:p>
          </table:table-cell>
          <table:table-cell table:style-name="TableRowCell" office:value-type="string">
            <text:p text:style-name="Table_20_Contents">Binario interno al colore</text:p>
          </table:table-cell>
        </table:table-row>
        <table:table-row>
          <table:table-cell table:style-name="TableRowCell" office:value-type="string">
            <text:p text:style-name="Table_20_Contents">Valore</text:p>
          </table:table-cell>
          <table:table-cell table:style-name="TableRowCell" office:value-type="string">
            <text:p text:style-name="Table_20_Contents">A(1) — 2 — … — 10 — J — Q — K</text:p>
          </table:table-cell>
          <table:table-cell table:style-name="TableRowCell" office:value-type="string">
            <text:p text:style-name="Table_20_Contents">Scala ordinale, 13 gradi</text:p>
          </table:table-cell>
        </table:table-row>
      </table:table>
      <text:p text:style-name="First_20_paragraph">Questi assi sono immutabili. Ogni gioco decide come mapparli a concetti di gioco; non può ridefinirli fisicamente sulla carta.</text:p>
      <text:h text:style-name="Heading_20_3" text:outline-level="3"><text:bookmark-start text:name="note-sul-substrato"/>3.2 Note sul substrato<text:bookmark-end text:name="note-sul-substrato"/></text:h>
      <text:list text:style-name="L3">
        <text:list-item>
          <text:p text:style-name="P3">Le figure (J, Q, K) formano una sottoclasse del valore ordinale. Alcuni giochi potranno trattarle come categoria separata.</text:p>
        </text:list-item>
        <text:list-item>
          <text:p text:style-name="P3">Il Jolly non appartiene a nessuno dei tre assi. È strutturalmente fuori sistema per definizione. Vedi sezione 7.</text:p>
        </text:list-item>
        <text:list-item>
          <text:p text:style-name="P3">Il dorso della carta è una superficie esclusa dall’annotazione. Vedi Principio 5 (sezione 2).</text:p>
        </text:list-item>
      </text:list>
      <text:h text:style-name="Heading_20_2" text:outline-level="2"><text:bookmark-start text:name="il-vocabolario-grafico"/>4. Il vocabolario grafico<text:bookmark-end text:name="il-vocabolario-grafico"/></text:h>
      <text:h text:style-name="Heading_20_3" text:outline-level="3"><text:bookmark-start text:name="principi"/>4.1 Principi<text:bookmark-end text:name="principi"/></text:h>
      <text:list text:style-name="L4">
        <text:list-item>
          <text:p text:style-name="P4">Tutti i glifi sono producibili con pochi tratti da chiunque, senza abilità grafica.</text:p>
        </text:list-item>
        <text:list-item>
          <text:p text:style-name="P4">L’unica risorsa cromatica aggiuntiva è il pennarello rosso. Il nero è il colore di default.</text:p>
        </text:list-item>
        <text:list-item>
          <text:p text:style-name="P4">Nessun testo. Nessun glifo che rimandi a un alfabeto specifico.</text:p>
        </text:list-item>
        <text:list-item>
          <text:p text:style-name="P4">I glifi non devono confondersi visivamente con i semi esistenti.</text:p>
        </text:list-item>
      </text:list>
      <text:h text:style-name="Heading_20_3" text:outline-level="3"><text:bookmark-start text:name="glifi-primari"/>4.2 Glifi primari<text:bookmark-end text:name="glifi-primari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Glifo</text:p>
            </table:table-cell>
            <table:table-cell table:style-name="TableHeaderRowCell" office:value-type="string">
              <text:p text:style-name="Table_20_Heading">Tratti</text:p>
            </table:table-cell>
            <table:table-cell table:style-name="TableHeaderRowCell" office:value-type="string">
              <text:p text:style-name="Table_20_Heading">Semantiche naturali (non prescritte)</text:p>
            </table:table-cell>
          </table:table-row>
        </table:table-header-rows>
        <table:table-row>
          <table:table-cell table:style-name="TableRowCell" office:value-type="string">
            <text:p text:style-name="Table_20_Contents">- punto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presenza, attivazione, marcatore</text:p>
          </table:table-cell>
        </table:table-row>
        <table:table-row>
          <table:table-cell table:style-name="TableRowCell" office:value-type="string">
            <text:p text:style-name="Table_20_Contents">— linea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bordo, separazione, soglia</text:p>
          </table:table-cell>
        </table:table-row>
        <table:table-row>
          <table:table-cell table:style-name="TableRowCell" office:value-type="string">
            <text:p text:style-name="Table_20_Contents">+ croce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connessione, incrocio, unione</text:p>
          </table:table-cell>
        </table:table-row>
        <table:table-row>
          <table:table-cell table:style-name="TableRowCell" office:value-type="string">
            <text:p text:style-name="Table_20_Contents">× diagonale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negazione, blocco, esclusione</text:p>
          </table:table-cell>
        </table:table-row>
        <table:table-row>
          <table:table-cell table:style-name="TableRowCell" office:value-type="string">
            <text:p text:style-name="Table_20_Contents">△ triangolo</text:p>
          </table:table-cell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direzione, gerarchia, gradiente</text:p>
          </table:table-cell>
        </table:table-row>
        <table:table-row>
          <table:table-cell table:style-name="TableRowCell" office:value-type="string">
            <text:p text:style-name="Table_20_Contents">○ cerchio</text:p>
          </table:table-cell>
          <table:table-cell table:style-name="TableRowCell" office:value-type="string">
            <text:p text:style-name="Table_20_Contents">1 curvo</text:p>
          </table:table-cell>
          <table:table-cell table:style-name="TableRowCell" office:value-type="string">
            <text:p text:style-name="Table_20_Contents">ciclo, contenimento, stato neutro</text:p>
          </table:table-cell>
        </table:table-row>
        <table:table-row>
          <table:table-cell table:style-name="TableRowCell" office:value-type="string">
            <text:p text:style-name="Table_20_Contents">□ quadrato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zona, regione, spazio chiuso</text:p>
          </table:table-cell>
        </table:table-row>
      </table:table>
      <text:p text:style-name="First_20_paragraph">Sette glifi. La colonna “semantiche naturali” suggerisce associazioni intuitive; non le prescrive.</text:p>
      <text:h text:style-name="Heading_20_3" text:outline-level="3"><text:bookmark-start text:name="il-colore-dei-glifi-regola-contrastante"/>4.3 Il colore dei glifi — regola contrastante<text:bookmark-end text:name="il-colore-dei-glifi-regola-contrastante"/></text:h>
      <text:p text:style-name="First_20_paragraph">I glifi del primario e del modificatore sono tracciati nel colore <text:span text:style-name="T1">contrastante</text:span> rispetto al seme della carta:</text:p>
      <text:list text:style-name="L5">
        <text:list-item>
          <text:p text:style-name="P5">Carte rosse (♥ ♦): glifi in <text:span text:style-name="T1">nero</text:span></text:p>
        </text:list-item>
        <text:list-item>
          <text:p text:style-name="P5">Carte nere (♣ ♠): glifi in <text:span text:style-name="T1">rosso</text:span></text:p>
        </text:list-item>
      </text:list>
      <text:p text:style-name="First_20_paragraph">Questa regola garantisce separazione visiva netta tra annotazione e substrato su tutte le carte. Il colore del glifo è interamente derivabile dal seme — non aggiunge informazione differenziale ma massimizza la leggibilità.</text:p>
      <text:h text:style-name="Heading_20_3" text:outline-level="3"><text:bookmark-start text:name="glifi-numerici"/>4.4 Glifi numerici<text:bookmark-end text:name="glifi-numerici"/></text:h>
      <text:p text:style-name="First_20_paragraph">Le cifre 0–9 (arabiche) possono essere usate nelle zone annotabili come quantità, livelli, contatori. Si combinano con il colore seguendo la stessa logica dei glifi primari.</text:p>
      <text:h text:style-name="Heading_20_3" text:outline-level="3"><text:bookmark-start text:name="conflitti-visivi-da-evitare"/>4.5 Conflitti visivi da evitare<text:bookmark-end text:name="conflitti-visivi-da-evitare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Seme</text:p>
            </table:table-cell>
            <table:table-cell table:style-name="TableHeaderRowCell" office:value-type="string">
              <text:p text:style-name="Table_20_Heading">Forma riservata</text:p>
            </table:table-cell>
          </table:table-row>
        </table:table-header-rows>
        <table:table-row>
          <table:table-cell table:style-name="TableRowCell" office:value-type="string">
            <text:p text:style-name="Table_20_Contents">Cuori</text:p>
          </table:table-cell>
          <table:table-cell table:style-name="TableRowCell" office:value-type="string">
            <text:p text:style-name="Table_20_Contents">Forma a cuore</text:p>
          </table:table-cell>
        </table:table-row>
        <table:table-row>
          <table:table-cell table:style-name="TableRowCell" office:value-type="string">
            <text:p text:style-name="Table_20_Contents">Quadri</text:p>
          </table:table-cell>
          <table:table-cell table:style-name="TableRowCell" office:value-type="string">
            <text:p text:style-name="Table_20_Contents">Rombo pieno o vuoto</text:p>
          </table:table-cell>
        </table:table-row>
        <table:table-row>
          <table:table-cell table:style-name="TableRowCell" office:value-type="string">
            <text:p text:style-name="Table_20_Contents">Fiori</text:p>
          </table:table-cell>
          <table:table-cell table:style-name="TableRowCell" office:value-type="string">
            <text:p text:style-name="Table_20_Contents">Trifoglio / forma a tre lobi</text:p>
          </table:table-cell>
        </table:table-row>
        <table:table-row>
          <table:table-cell table:style-name="TableRowCell" office:value-type="string">
            <text:p text:style-name="Table_20_Contents">Picche</text:p>
          </table:table-cell>
          <table:table-cell table:style-name="TableRowCell" office:value-type="string">
            <text:p text:style-name="Table_20_Contents">Picca / cuore invertito con gambo</text:p>
          </table:table-cell>
        </table:table-row>
      </table:table>
      <text:p text:style-name="First_20_paragraph">Il quadrato □ e il cerchio ○ non confliggono con nessun seme. Il triangolo △ è sicuro se tracciato piccolo e in posizione angolare.</text:p>
      <text:h text:style-name="Heading_20_2" text:outline-level="2"><text:bookmark-start text:name="le-zone-annotabili"/>5. Le zone annotabili<text:bookmark-end text:name="le-zone-annotabili"/></text:h>
      <text:p text:style-name="P6">[NW] ----[N]---- [NE]</text:p>
      <text:p text:style-name="P7"><text:s text:c="2"/>| <text:s text:c="14"/>|</text:p>
      <text:p text:style-name="P8"><text:s text:c="1"/>[W] <text:s text:c="1"/>[centro] <text:s text:c="1"/>[E]</text:p>
      <text:p text:style-name="P9"><text:s text:c="2"/>| <text:s text:c="14"/>|</text:p>
      <text:p text:style-name="P10">[SW] ----[S]---- [SE]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Zona</text:p>
            </table:table-cell>
            <table:table-cell table:style-name="TableHeaderRowCell" office:value-type="string">
              <text:p text:style-name="Table_20_Heading">Posizione</text:p>
            </table:table-cell>
            <table:table-cell table:style-name="TableHeaderRowCell" office:value-type="string">
              <text:p text:style-name="Table_20_Heading">Annotazione DECK#</text:p>
            </table:table-cell>
          </table:table-row>
        </table:table-header-rows>
        <table:table-row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Bordo medio inferiore (interno)</text:p>
          </table:table-cell>
          <table:table-cell table:style-name="TableRowCell" office:value-type="string">
            <text:p text:style-name="Table_20_Contents">Glifo primario</text:p>
          </table:table-cell>
        </table:table-row>
        <table:table-row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Bordo medio superiore (interno)</text:p>
          </table:table-cell>
          <table:table-cell table:style-name="TableRowCell" office:value-type="string">
            <text:p text:style-name="Table_20_Contents">Speculare del primario — hand mode</text:p>
          </table:table-cell>
        </table:table-row>
        <table:table-row>
          <table:table-cell table:style-name="TableRowCell" office:value-type="string">
            <text:p text:style-name="Table_20_Contents">NE</text:p>
          </table:table-cell>
          <table:table-cell table:style-name="TableRowCell" office:value-type="string">
            <text:p text:style-name="Table_20_Contents">Angolo superiore destro</text:p>
          </table:table-cell>
          <table:table-cell table:style-name="TableRowCell" office:value-type="string">
            <text:p text:style-name="Table_20_Contents">Glifo modificatore</text:p>
          </table:table-cell>
        </table:table-row>
        <table:table-row>
          <table:table-cell table:style-name="TableRowCell" office:value-type="string">
            <text:p text:style-name="Table_20_Contents">SW</text:p>
          </table:table-cell>
          <table:table-cell table:style-name="TableRowCell" office:value-type="string">
            <text:p text:style-name="Table_20_Contents">Angolo inferiore sinistro</text:p>
          </table:table-cell>
          <table:table-cell table:style-name="TableRowCell" office:value-type="string">
            <text:p text:style-name="Table_20_Contents">Speculare del modificatore — hand mode</text:p>
          </table:table-cell>
        </table:table-row>
        <table:table-row>
          <table:table-cell table:style-name="TableRowCell" office:value-type="string">
            <text:p text:style-name="Table_20_Contents">SE</text:p>
          </table:table-cell>
          <table:table-cell table:style-name="TableRowCell" office:value-type="string">
            <text:p text:style-name="Table_20_Contents">Angolo inferiore destro</text:p>
          </table:table-cell>
          <table:table-cell table:style-name="TableRowCell" office:value-type="string">
            <text:p text:style-name="Table_20_Contents">Punto orientamento (polo nord)</text:p>
          </table:table-cell>
        </table:table-row>
        <table:table-row>
          <table:table-cell table:style-name="TableRowCell" office:value-type="string">
            <text:p text:style-name="Table_20_Contents">NW</text:p>
          </table:table-cell>
          <table:table-cell table:style-name="TableRowCell" office:value-type="string">
            <text:p text:style-name="Table_20_Contents">Angolo superiore sinistro</text:p>
          </table:table-cell>
          <table:table-cell table:style-name="TableRowCell" office:value-type="string">
            <text:p text:style-name="Table_20_Contents">Riservato — indice pre-stampato</text:p>
          </table:table-cell>
        </table:table-row>
        <table:table-row>
          <table:table-cell table:style-name="TableRowCell" office:value-type="string">
            <text:p text:style-name="Table_20_Contents">Centro / E / 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Non occupati dall’annotazione DECK#</text:p>
          </table:table-cell>
        </table:table-row>
      </table:table>
      <text:p text:style-name="First_20_paragraph"><text:span text:style-name="T1">Bordi fisici:</text:span> i marcatori di connettività occupano il margine bianco esterno della carta (~3–4 mm) — fisicamente separati dalle zone interne.</text:p>
      <text:p text:style-name="Text_20_body"><text:span text:style-name="T1">Regola del posizionamento simmetrico:</text:span> ogni glifo compare in due posizioni speculari — zona primaria e zona speculare. Garantisce leggibilità a ventaglio indipendentemente dall’orientamento della carta in mano.</text:p>
      <text:p text:style-name="Text_20_body"><text:span text:style-name="T1">Nota su NW:</text:span> angolo parzialmente occupato dall’indice pre-stampato. Nessuna annotazione DECK# in questa zona.</text:p>
      <text:h text:style-name="Heading_20_2" text:outline-level="2"><text:bookmark-start text:name="il-sistema-spaziale"/>6. Il sistema spaziale<text:bookmark-end text:name="il-sistema-spaziale"/></text:h>
      <text:h text:style-name="Heading_20_3" text:outline-level="3"><text:bookmark-start text:name="il-problema-della-simmetria"/>6.1 Il problema della simmetria<text:bookmark-end text:name="il-problema-della-simmetria"/></text:h>
      <text:p text:style-name="First_20_paragraph">Le carte standard hanno simmetria verticale: si leggono uguale capovolte. Non appena un gioco introduce elementi spaziali, questa simmetria deve essere rotta esplicitamente.</text:p>
      <text:h text:style-name="Heading_20_3" text:outline-level="3"><text:bookmark-start text:name="la-convenzione-del-polo-nord"/>6.2 La convenzione del polo nord<text:bookmark-end text:name="la-convenzione-del-polo-nord"/></text:h>
      <text:p text:style-name="First_20_paragraph">Il polo nord di una carta è il lato con l’indice in posizione canonica (NW in alto a sinistra). Pratica consigliata per sessioni con elementi spaziali: tracciare un punto piccolo nell’angolo SE prima dell’inizio — angolo libero dalla stampa, asimmetrico rispetto all’indice NW.</text:p>
      <text:h text:style-name="Heading_20_3" text:outline-level="3"><text:bookmark-start text:name="marcatori-di-bordo"/>6.3 Marcatori di bordo<text:bookmark-end text:name="marcatori-di-bor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Marcatura</text:p>
            </table:table-cell>
            <table:table-cell table:style-name="TableHeaderRowCell" office:value-type="string">
              <text:p text:style-name="Table_20_Heading">Significato strutturale</text:p>
            </table:table-cell>
          </table:table-row>
        </table:table-header-rows>
        <table:table-row>
          <table:table-cell table:style-name="TableRowCell" office:value-type="string">
            <text:p text:style-name="Table_20_Contents">Linea spessa a tutto bordo</text:p>
          </table:table-cell>
          <table:table-cell table:style-name="TableRowCell" office:value-type="string">
            <text:p text:style-name="Table_20_Contents">Muro: passaggio chiuso</text:p>
          </table:table-cell>
        </table:table-row>
        <table:table-row>
          <table:table-cell table:style-name="TableRowCell" office:value-type="string">
            <text:p text:style-name="Table_20_Contents">Bordo non marcato</text:p>
          </table:table-cell>
          <table:table-cell table:style-name="TableRowCell" office:value-type="string">
            <text:p text:style-name="Table_20_Contents">Aperto: connesso, attraversabile</text:p>
          </table:table-cell>
        </table:table-row>
        <table:table-row>
          <table:table-cell table:style-name="TableRowCell" office:value-type="string">
            <text:p text:style-name="Table_20_Contents">Punto - a metà bordo</text:p>
          </table:table-cell>
          <table:table-cell table:style-name="TableRowCell" office:value-type="string">
            <text:p text:style-name="Table_20_Contents">Soglia: stato intermedio, definito dal gioco</text:p>
          </table:table-cell>
        </table:table-row>
      </table:table>
      <text:p text:style-name="First_20_paragraph">Accostando le carte sul tavolo, i bordi a contatto si leggono come interfaccia tra due spazi.</text:p>
      <text:h text:style-name="Heading_20_3" text:outline-level="3"><text:bookmark-start text:name="marcatori-di-quadrante"/>6.4 Marcatori di quadrante<text:bookmark-end text:name="marcatori-di-quadrante"/></text:h>
      <text:p text:style-name="First_20_paragraph">I marcatori di quadrante si trovano sul <text:span text:style-name="T1">dorso</text:span> delle 52 carte regolari. Sono identici su tutte le carte — non rivelano alcuna informazione differenziale quando la carta è coperta.</text:p>
      <text:p text:style-name="Text_20_body">Sono disponibili due varianti; la scelta è lasciata a chi annota il mazzo:</text:p>
      <text:p text:style-name="Text_20_body"><text:span text:style-name="T1">Variante minima</text:span> — quattro segmenti corti dal punto medio di ciascun bordo verso l’interno, senza attraversare il centro:</text:p>
      <text:p text:style-name="P11"><text:s text:c="6"/>|</text:p>
      <text:p text:style-name="P12"><text:s text:c="2"/>— <text:s text:c="4"/>—</text:p>
      <text:p text:style-name="P13"><text:s text:c="6"/>|</text:p>
      <text:p text:style-name="First_20_paragraph"><text:span text:style-name="T1">Variante estesa</text:span> — croce completa da bordo a bordo (<text:span text:style-name="Source_Text">+</text:span> del vocabolario DECK#, applicato al dorso con funzione strutturale fissa):</text:p>
      <text:p text:style-name="P14"><text:s text:c="6"/>|</text:p>
      <text:p text:style-name="P15"><text:s text:c="2"/>————+————</text:p>
      <text:p text:style-name="P16"><text:s text:c="6"/>|</text:p>
      <text:p text:style-name="First_20_paragraph">Entrambe le varianti sono tracciate in nero. I Jolly ricevono i marcatori di quadrante sul dorso — identici a quelli delle 52 carte regolari — ma non ricevono alcuna annotazione sul recto oltre al punto SE.</text:p>
      <text:h text:style-name="Heading_20_3" text:outline-level="3"><text:bookmark-start text:name="direzione-interna"/>6.5 Direzione interna<text:bookmark-end text:name="direzione-interna"/></text:h>
      <text:p text:style-name="First_20_paragraph">Il triangolo △ in una zona angolare indica direzione. L’orientamento dell’apice rispetto al polo nord definisce il vettore.</text:p>
      <text:h text:style-name="Heading_20_2" text:outline-level="2"><text:bookmark-start text:name="i-jolly"/>7. I Jolly<text:bookmark-end text:name="i-jolly"/></text:h>
      <text:p text:style-name="First_20_paragraph">I Jolly ricevono il <text:span text:style-name="T1">punto SE</text:span> (polo nord) sul recto e i <text:span text:style-name="T1">marcatori di quadrante</text:span> sul dorso. Nessun altro elemento strutturale: nessun marcatore di connettività, nessun glifo primario, nessun modificatore.</text:p>
      <text:p text:style-name="Text_20_body">Sono <text:span text:style-name="T1">variabili non istanziate</text:span>: nessuna semantica pre-assegnata dalla specifica. Il gioco decide tutto. Un gioco può usare zero, uno o entrambi i Jolly.</text:p>
      <text:p text:style-name="Text_20_body">Usi possibili (non prescritti): wildcard meccanica, carta evento, tracciatore di stato globale, Jolly di categoria.</text:p>
      <text:h text:style-name="Heading_20_2" text:outline-level="2"><text:bookmark-start text:name="profili-di-utilizzo"/>8. Profili di utilizzo<text:bookmark-end text:name="profili-di-utilizzo"/></text:h>
      <text:h text:style-name="Heading_20_3" text:outline-level="3"><text:bookmark-start text:name="profilo-base"/>Profilo Base<text:bookmark-end text:name="profilo-base"/></text:h>
      <text:p text:style-name="First_20_paragraph">Gioco di carte puro, gestione della mano, narrativa, scenari solitario.</text:p>
      <text:p text:style-name="Text_20_body"><text:span text:style-name="T1">Componenti:</text:span> 1 mazzo annotato (52 + 2) · 1 pennarello nero permanente fine · 1 pennarello rosso permanente fine. Tempo di annotazione stimato: 15–20 minuti.</text:p>
      <text:h text:style-name="Heading_20_3" text:outline-level="3"><text:bookmark-start text:name="profilo-esteso"/>Profilo Esteso<text:bookmark-end text:name="profilo-esteso"/></text:h>
      <text:p text:style-name="First_20_paragraph">Gioco tattico su griglia, dungeon crawler, skirmish, wargame.</text:p>
      <text:p text:style-name="Text_20_body"><text:span text:style-name="T1">Componenti aggiuntivi:</text:span> 6 dadi d6 · 12 segnalini in 4 gruppi distinti (3 per gruppo; sostituibili con monete, cubetti, qualsiasi oggetto distinguibile).</text:p>
      <text:p text:style-name="Text_20_body">Uso dadi: 2d6 per risoluzione, fino a 4d6 come contatori su carta. Uso segnalini: posizionati sulle carte per rappresentare entità senza coprire le annotazioni.</text:p>
      <text:h text:style-name="Heading_20_2" text:outline-level="2"><text:bookmark-start text:name="modalità-duso-delle-carte"/>9. Modalità d’uso delle carte<text:bookmark-end text:name="modalità-duso-delle-carte"/></text:h>
      <text:h text:style-name="Heading_20_3" text:outline-level="3"><text:bookmark-start text:name="tile-mode"/>9.1 Tile mode<text:bookmark-end text:name="tile-mode"/></text:h>
      <text:p text:style-name="First_20_paragraph">Carta sul tavolo, visibile a tutti, posizione fissa. Elementi spaziali attivi.</text:p>
      <text:h text:style-name="Heading_20_3" text:outline-level="3"><text:bookmark-start text:name="hand-mode"/>9.2 Hand mode<text:bookmark-end text:name="hand-mode"/></text:h>
      <text:p text:style-name="First_20_paragraph">Carta in mano, nascosta. Elementi spaziali generalmente inattivi. Annotazioni devono seguire la regola del posizionamento simmetrico (sezione 5).</text:p>
      <text:h text:style-name="Heading_20_3" text:outline-level="3"><text:bookmark-start text:name="transizione-hand-tile"/>9.3 Transizione hand → tile<text:bookmark-end text:name="transizione-hand-tile"/></text:h>
      <text:p text:style-name="First_20_paragraph">Il gioco deve specificare:</text:p>
      <text:list text:style-name="L6">
        <text:list-item>
          <text:p text:style-name="P17">Se la carta viene posata coperta o scoperta</text:p>
        </text:list-item>
        <text:list-item>
          <text:p text:style-name="P17">Se l’orientamento (polo nord) è scelto dal giocatore o fisso</text:p>
        </text:list-item>
        <text:list-item>
          <text:p text:style-name="P17">Se le annotazioni spaziali diventano attive immediatamente o in un momento successivo</text:p>
        </text:list-item>
      </text:list>
      <text:h text:style-name="Heading_20_3" text:outline-level="3"><text:bookmark-start text:name="annotazione"/>9.4 Annotazione<text:bookmark-end text:name="annotazione"/></text:h>
      <text:p text:style-name="First_20_paragraph">Il mazzo DECK# viene annotato integralmente una volta, seguendo la matrice di annotazione (sezione 13), e usato in più sessioni senza modifiche. L’annotazione strutturale è permanente.</text:p>
      <text:p text:style-name="Text_20_body">Non è prevista annotazione durante il gioco per il layer strutturale. Gli stati variabili della partita si tracciano esclusivamente con token fisici rimovibili (dadi, segnalini, monete).</text:p>
      <text:h text:style-name="Heading_20_2" text:outline-level="2"><text:bookmark-start text:name="gerarchia-fisica"/>10. Gerarchia fisica<text:bookmark-end text:name="gerarchia-fisica"/></text:h>
      <text:p text:style-name="First_20_paragraph">Le 52 carte regolari hanno annotazioni su entrambe le facce. I Jolly hanno annotazioni sul dorso e solo il punto SE sul recto.</text:p>
      <text:p text:style-name="Text_20_body"><text:span text:style-name="T1">Recto (52 carte regolari):</text:span></text:p>
      <text:list text:style-name="L7">
        <text:list-item>
          <text:p text:style-name="P18">Substrato ereditato (stampa originale): sempre visibile, mai coperto intenzionalmente</text:p>
        </text:list-item>
        <text:list-item>
          <text:p text:style-name="P18">Annotazione strutturale DECK#: connettività sui bordi fisici, glifo primario in zona S/N, modificatore in zona NE/SW, punto polo nord in SE</text:p>
        </text:list-item>
        <text:list-item>
          <text:p text:style-name="P18">Token fisici: oggetti posizionati sulla carta, rimuovibili</text:p>
        </text:list-item>
      </text:list>
      <text:p text:style-name="First_20_paragraph"><text:span text:style-name="T1">Dorso (tutte le 54 carte):</text:span></text:p>
      <text:list text:style-name="L8">
        <text:list-item>
          <text:p text:style-name="P19">Marcatori di quadrante (variante minima o estesa) — identici su tutte le carte</text:p>
        </text:list-item>
      </text:list>
      <text:p text:style-name="First_20_paragraph">L’annotazione strutturale è fissa e completa. Nessuna zona del recto prevede più di un glifo DECK# per volta.</text:p>
      <text:h text:style-name="Heading_20_2" text:outline-level="2"><text:bookmark-start text:name="responsabilità-del-designer"/>11. Responsabilità del designer<text:bookmark-end text:name="responsabilità-del-designer"/></text:h>
      <text:p text:style-name="First_20_paragraph">Ogni gioco costruito su DECK# deve specificare:</text:p>
      <text:list text:style-name="L9">
        <text:list-item>
          <text:p text:style-name="P20">Come mappa i tre assi ereditati (valore, colore, seme) a concetti di gioco</text:p>
        </text:list-item>
        <text:list-item>
          <text:p text:style-name="P20">Quale semantica assegna ai glifi del vocabolario DECK# (primario e modificatore)</text:p>
        </text:list-item>
        <text:list-item>
          <text:p text:style-name="P20">Come interpreta il sistema spaziale: orientamento, polo nord, connettività</text:p>
        </text:list-item>
        <text:list-item>
          <text:p text:style-name="P20">Come interpreta i marcatori di quadrante (presenti su tutte le carte)</text:p>
        </text:list-item>
        <text:list-item>
          <text:p text:style-name="P20">Se usa i Jolly e con quale ruolo</text:p>
        </text:list-item>
        <text:list-item>
          <text:p text:style-name="P20">Quale profilo è richiesto (Base o Esteso)</text:p>
        </text:list-item>
        <text:list-item>
          <text:p text:style-name="P20">Quale modalità d’uso è prevista e le regole di transizione hand → tile</text:p>
        </text:list-item>
      </text:list>
      <text:h text:style-name="Heading_20_2" text:outline-level="2"><text:bookmark-start text:name="licenza"/>12. Licenza<text:bookmark-end text:name="licenza"/></text:h>
      <text:p text:style-name="First_20_paragraph">DECK# è rilasciato sotto <text:span text:style-name="T1">Creative Commons Attribution 4.0 International (CC BY 4.0)</text:span>.</text:p>
      <text:p text:style-name="Text_20_body">Chiunque può usare, modificare e distribuire la specifica e i giochi costruiti su di essa, anche a fini commerciali, a condizione di attribuire la fonte originale. I giochi costruiti su DECK# non sono tenuti a rilasciare i propri regolamenti con la stessa licenza.</text:p>
      <text:p text:style-name="Text_20_body">© Roberto Bisceglie — <text:a xlink:type="simple" xlink:href="https://creativecommons.org/licenses/by/4.0/" office:name=""><text:span text:style-name="Definition">CC BY 4.0</text:span></text:a></text:p>
      <text:h text:style-name="Heading_20_2" text:outline-level="2"><text:bookmark-start text:name="la-matrice-di-annotazione"/>13. La matrice di annotazione<text:bookmark-end text:name="la-matrice-di-annotazione"/></text:h>
      <text:p text:style-name="First_20_paragraph">La matrice definisce le annotazioni strutturali fisse di tutte le 54 carte. Ogni carta riceve:</text:p>
      <text:list text:style-name="L10">
        <text:list-item>
          <text:p text:style-name="P21"><text:span text:style-name="T1">Connettività:</text:span> bordi aperti (gli altri ricevono marcatore di muro). Notazione: N/S/E/W separati da <text:span text:style-name="Source_Text">+</text:span>.</text:p>
        </text:list-item>
        <text:list-item>
          <text:p text:style-name="P21"><text:span text:style-name="T1">Primario:</text:span> glifo in zona S (e speculare in zona N per hand mode).</text:p>
        </text:list-item>
        <text:list-item>
          <text:p text:style-name="P21"><text:span text:style-name="T1">Modificatore:</text:span> glifo in angolo NE (e speculare in angolo SW per hand mode).</text:p>
        </text:list-item>
      </text:list>
      <text:p text:style-name="First_20_paragraph">Tutte le 52 carte regolari ricevono inoltre: punto SE (polo nord) e marcatori di quadrante.<text:line-break/>I Jolly ricevono il punto SE sul recto e i marcatori di quadrante sul dorso.</text:p>
      <text:p text:style-name="Text_20_body">La distribuzione è un artefatto di design authored, ortogonale a valore/seme/colore per costruzione deliberata. Il colore dei glifi non è incluso come colonna — è interamente derivato dal seme secondo la regola contrastante (sezione 4.3): glifi neri su ♥/♦, glifi rossi su ♣/♠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HeaderRowCell" office:value-type="string">
              <text:p text:style-name="Table_20_Heading">Valore</text:p>
            </table:table-cell>
            <table:table-cell table:style-name="TableHeaderRowCell" office:value-type="string">
              <text:p text:style-name="Table_20_Heading">Seme</text:p>
            </table:table-cell>
            <table:table-cell table:style-name="TableHeaderRowCell" office:value-type="string">
              <text:p text:style-name="Table_20_Heading">Connettività</text:p>
            </table:table-cell>
            <table:table-cell table:style-name="TableHeaderRowCell" office:value-type="string">
              <text:p text:style-name="Table_20_Heading">Primario</text:p>
            </table:table-cell>
            <table:table-cell table:style-name="TableHeaderRowCell" office:value-type="string">
              <text:p text:style-name="Table_20_Heading">Modificatore</text:p>
            </table:table-cell>
          </table:table-row>
        </table:table-header-rows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E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E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+E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Jolly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olly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it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Specifiche DECK#</dc:title>
    <dc:description/>
    <dc:subject/>
    <meta:keyword/>
    <dc:language>it</dc:language>
    <meta:initial-creator>Roberto Bisceglie</meta:initial-creator>
    <dc:creator>Roberto Bisceglie</dc:creator>
    <meta:creation-date>2026-07-01T07:47:50Z</meta:creation-date>
    <dc:date>2026-07-01T07:47:50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7-01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Sistema di annotazione stratificata per mazzo di carte standard</meta:user-defined>
    <meta:user-defined meta:name="toc-title" meta:value-type="string">Indice</meta:user-defined>
    <meta:user-defined meta:name="version" meta:value-type="string">1</meta:user-defined>
  </office:meta>
</office:document-meta>
</file>