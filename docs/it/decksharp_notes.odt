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Note di Design DECK#</text:p>
      <text:p text:style-name="Subtitle">Traccia delle decisioni di progettazione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documento interno</text:p>
      <text:p text:style-name="Horizontal_20_Line"/>
      <text:h text:style-name="Heading_20_2" text:outline-level="2"><text:bookmark-start text:name="dc-01-nome-del-sistema-deck"/>DC-01 — Nome del sistema: DECK<text:bookmark-end text:name="dc-01-nome-del-sistema-deck"/></text:h>
      <text:p text:style-name="First_20_paragraph"><text:span text:style-name="T1">Decisione:</text:span> il sistema si chiama DECK#. <text:span text:style-name="T1">Alternativa considerata:</text:span> Deckpack. <text:span text:style-name="T1">Motivazione:</text:span> DECK# (dal greco: lingua, vocabolario) riflette la natura del sistema — un vocabolario condiviso per comunicare informazioni meccaniche. È agnostico alla lingua pur essendo un nome non neutro, il che è appropriato: il nome è un’etichetta meta, non un componente del sistema. Deckpack resta valido per eventuali edizioni fisiche o derivati commerciali.</text:p>
      <text:p text:style-name="Horizontal_20_Line"/>
      <text:h text:style-name="Heading_20_2" text:outline-level="2"><text:bookmark-start text:name="dc-02-ampiezza-del-mazzo-base-52-2-jolly"/>DC-02 — Ampiezza del mazzo base: 52 + 2 Jolly<text:bookmark-end text:name="dc-02-ampiezza-del-mazzo-base-52-2-jolly"/></text:h>
      <text:p text:style-name="First_20_paragraph"><text:span text:style-name="T1">Decisione:</text:span> 54 carte totali. <text:span text:style-name="T1">Motivazione:</text:span> i Jolly sono strutturalmente distinti già nel mazzo standard — l’unica carta priva di seme e valore. Escluderli sarebbe sprecare una risorsa di design. Le carte pubblicitarie presenti in alcuni mazzi non sono standardizzate e non entrano nella specifica.</text:p>
      <text:p text:style-name="Horizontal_20_Line"/>
      <text:h text:style-name="Heading_20_2" text:outline-level="2"><text:bookmark-start text:name="dc-03-marcatura-permanente"/>DC-03 — Marcatura permanente<text:bookmark-end text:name="dc-03-marcatura-permanente"/></text:h>
      <text:p text:style-name="First_20_paragraph"><text:span text:style-name="T1">Decisione:</text:span> annotazioni con pennarello indelebile. <text:span text:style-name="T1">Alternative considerate:</text:span> cancellabile per tutti i layer; sistema misto. <text:span text:style-name="T1">Motivazione:</text:span> la marcatura permanente trasforma ogni mazzo in un artefatto unico. Gli stati variabili vengono tracciati con token fisici già rimovibili per natura. Il sistema misto è disponibile come pratica opzionale per i singoli giochi ma non viene prescritto.</text:p>
      <text:p text:style-name="Horizontal_20_Line"/>
      <text:h text:style-name="Heading_20_2" text:outline-level="2"><text:bookmark-start text:name="dc-04-sistema-aperto-nessuna-mappatura-valore-funzione"/>DC-04 — Sistema aperto: nessuna mappatura valore → funzione<text:bookmark-end text:name="dc-04-sistema-aperto-nessuna-mappatura-valore-funzione"/></text:h>
      <text:p text:style-name="First_20_paragraph"><text:span text:style-name="T1">Decisione:</text:span> DECK# non assegna funzioni meccaniche per valore. <text:span text:style-name="T1">Alternativa scartata:</text:span> cardpack-spec v0.2.0 aveva definito Space (A-6) / Resource (7-10) / Actor (J-Q-K) come partizione fissa. <text:span text:style-name="T1">Motivazione:</text:span> quella partizione è la struttura di un gioco tattico specifico, non un vocabolario aperto. Blocca qualsiasi gioco che voglia usare un Asso come personaggio o un Re come territorio. Un sistema aperto non prescrive cosa rappresenta ogni carta — lo fa ogni gioco costruito sopra.</text:p>
      <text:p text:style-name="Horizontal_20_Line"/>
      <text:h text:style-name="Heading_20_2" text:outline-level="2"><text:bookmark-start text:name="dc-05-sette-glifi-primari-vocabolario-chiuso"/>DC-05 — Sette glifi primari (vocabolario chiuso)<text:bookmark-end text:name="dc-05-sette-glifi-primari-vocabolario-chiuso"/></text:h>
      <text:p text:style-name="First_20_paragraph"><text:span text:style-name="T1">Decisione:</text:span> esattamente 7 glifi: punto, linea, croce, diagonale, triangolo, cerchio, quadrato. <text:span text:style-name="T1">Motivazione:</text:span> coprono le forme geometriche primitive producibili con 1-4 tratti. Sufficientemente distinti visivamente tra loro e dai semi. Il vocabolario è chiuso per garantire interoperabilità — un glifo non presente non esiste in DECK#. L’asterisco di cardpack-spec v0.2.0 è stato escluso perché visivamente ambiguo e motivato da un ruolo semantico (Jolly) che la specifica non deve pre-assegnare.</text:p>
      <text:p text:style-name="Horizontal_20_Line"/>
      <text:h text:style-name="Heading_20_2" text:outline-level="2"><text:bookmark-start text:name="dc-06-colore-dei-glifi-regola-contrastante"/>DC-06 — Colore dei glifi: regola contrastante<text:bookmark-end text:name="dc-06-colore-dei-glifi-regola-contrastante"/></text:h>
      <text:p text:style-name="First_20_paragraph"><text:span text:style-name="T1">Decisione originale (v0.1–v0.6):</text:span> il colore del pennarello è un layer semantico indipendente, ortogonale al glifo; convenzione non prescritta. <text:span text:style-name="T1">Decisione aggiornata (v0.7):</text:span> il colore dei glifi segue la regola contrastante fissa — glifi neri su carte rosse (♥/♦), glifi rossi su carte nere (♣/♠). Vedi DC-22. <text:span text:style-name="T1">Motivazione del cambiamento:</text:span> un asse semantico “disponibile ma non prescritto” non entra mai nell’annotazione canonica. La regola contrastante è semplice, memorabile e garantisce alta leggibilità su tutte le carte senza richiedere una colonna colore nella matrice.</text:p>
      <text:p text:style-name="Horizontal_20_Line"/>
      <text:h text:style-name="Heading_20_2" text:outline-level="2"><text:bookmark-start text:name="dc-07-dorso-eccezione-per-marcatori-di-quadrante"/>DC-07 — Dorso: eccezione per marcatori di quadrante<text:bookmark-end text:name="dc-07-dorso-eccezione-per-marcatori-di-quadrante"/></text:h>
      <text:p text:style-name="First_20_paragraph"><text:span text:style-name="T1">Decisione originale (v0.1–v0.5):</text:span> dorso escluso dall’annotazione. <text:span text:style-name="T1">Decisione aggiornata (v0.6):</text:span> il dorso delle 52 carte regolari riceve esclusivamente i marcatori di quadrante. Due varianti ammesse: minima (quattro segmenti corti ai punti medi) o estesa (croce completa <text:span text:style-name="Source_Text">+</text:span>). La scelta è lasciata a chi annota. I Jolly non ricevono marcatori di quadrante nemmeno sul dorso. <text:span text:style-name="T1">Motivazione dell’eccezione:</text:span> i marcatori di quadrante sono identici su tutte le 52 carte regolari — non rivelano nessuna informazione differenziale. La motivazione originale (preservare l’anonimità per fog-of-war) non si applica a marcatori uniformi. Il beneficio è eliminare la coesistenza con il glifo primario in zona S (DA-01 / DC-21, ora superate).</text:p>
      <text:p text:style-name="Horizontal_20_Line"/>
      <text:h text:style-name="Heading_20_2" text:outline-level="2"><text:bookmark-start text:name="dc-08-convenzione-del-polo-nord"/>DC-08 — Convenzione del polo nord<text:bookmark-end text:name="dc-08-convenzione-del-polo-nord"/></text:h>
      <text:p text:style-name="First_20_paragraph"><text:span text:style-name="T1">Decisione:</text:span> polo nord = lato con indice NW canonico. Punto in SE come marcatore di orientamento. <text:span text:style-name="T1">Problema:</text:span> le carte hanno simmetria verticale per motivi ergonomici. Con elementi spaziali, va rotta esplicitamente. <text:span text:style-name="T1">Motivazione:</text:span> il punto in SE è la soluzione meno invasiva — non copre nulla, è asimmetrico, richiede un tratto. Una freccia fissa avrebbe introdotto semantica spaziale anche per giochi senza orientamento.</text:p>
      <text:p text:style-name="Horizontal_20_Line"/>
      <text:h text:style-name="Heading_20_2" text:outline-level="2"><text:bookmark-start text:name="dc-09-posizionamento-simmetrico-in-hand-mode"/>DC-09 — Posizionamento simmetrico in hand mode<text:bookmark-end text:name="dc-09-posizionamento-simmetrico-in-hand-mode"/></text:h>
      <text:p text:style-name="First_20_paragraph"><text:span text:style-name="T1">Decisione:</text:span> annotazioni in due posizioni speculari — glifo primario in zona S con speculare in N; modificatore in angolo NE con speculare in SW. Vedi DC-18 per le zone specifiche. <text:span text:style-name="T1">Fonte:</text:span> cardpack-spec v0.2.0 (zone aggiornate in DC-18). <text:span text:style-name="T1">Motivazione:</text:span> convenzione ergonomica standard dei mazzi — gli indici sono già duplicati e ruotati per la stessa ragione. Garantisce leggibilità a ventaglio senza regole aggiuntive.</text:p>
      <text:p text:style-name="Horizontal_20_Line"/>
      <text:h text:style-name="Heading_20_2" text:outline-level="2"><text:bookmark-start text:name="dc-10-marcatori-di-quadrante"/>DC-10 — Marcatori di quadrante<text:bookmark-end text:name="dc-10-marcatori-di-quadrante"/></text:h>
      <text:p text:style-name="First_20_paragraph"><text:span text:style-name="T1">Decisione:</text:span> presenti sul <text:span text:style-name="T1">dorso</text:span> delle 52 carte regolari (migrazione dal recto in v0.6, vedi DC-07 rev.). Due varianti: minima (quattro segmenti corti) o estesa (croce <text:span text:style-name="Source_Text">+</text:span>). Assenti sui Jolly. <text:span text:style-name="T1">Fonte:</text:span> cardpack-spec v0.2.0 (universalità stabilita in DC-17; migrazione al dorso in DC-07 rev. v0.6). <text:span text:style-name="T1">Motivazione:</text:span> sul recto i segmenti corti erano necessari per evitare di coprire i pip. Sul dorso la variante estesa (croce completa) diventa praticabile senza interferenze.</text:p>
      <text:p text:style-name="Text_20_body"><text:span text:style-name="T1">Revisione v0.7.1 (2026-05-13):</text:span> estesi anche ai Jolly sul dorso. Vedi DC-11 rev. per la motivazione.</text:p>
      <text:p text:style-name="Horizontal_20_Line"/>
      <text:h text:style-name="Heading_20_2" text:outline-level="2"><text:bookmark-start text:name="dc-11-jolly-come-variabili-non-istanziate"/>DC-11 — Jolly come variabili non istanziate<text:bookmark-end text:name="dc-11-jolly-come-variabili-non-istanziate"/></text:h>
      <text:p text:style-name="First_20_paragraph"><text:span text:style-name="T1">Decisione:</text:span> i Jolly ricevono solo il punto SE (polo nord). Nessun glifo primario, nessun modificatore, nessun marcatore di connettività, nessun marcatore di quadrante. <text:span text:style-name="T1">Alternativa scartata:</text:span> asterisco fisso in cardpack-spec v0.2.0. <text:span text:style-name="T1">Motivazione:</text:span> l’asterisco trasforma i Jolly in un ruolo funzionale specifico prima che un gioco li usi. Un sistema aperto lascia i Jolly come superfici neutre. La loro assenza dagli assi ereditati è già sufficiente a distinguerli.</text:p>
      <text:p text:style-name="Text_20_body"><text:span text:style-name="T1">Revisione v0.7.1 (2026-05-13):</text:span> i Jolly ricevono i marcatori di quadrante sul dorso. La motivazione originale (neutralità del Jolly come superficie bianca) si applica al recto, non al dorso: i marcatori di quadrante sono uniformi su tutte le carte e non trasmettono alcuna informazione differenziale. La loro assenza sul dorso dei Jolly li rendeva riconoscibili a carte coperte, compromettendo il fog-of-war. Il principio di neutralità rimane integro: il Jolly è ancora privo di semantica pre-assegnata sul recto.</text:p>
      <text:p text:style-name="Horizontal_20_Line"/>
      <text:h text:style-name="Heading_20_2" text:outline-level="2"><text:bookmark-start text:name="dc-12-profili-base-ed-esteso"/>DC-12 — Profili Base ed Esteso<text:bookmark-end text:name="dc-12-profili-base-ed-esteso"/></text:h>
      <text:p text:style-name="First_20_paragraph"><text:span text:style-name="T1">Decisione:</text:span> due profili con requisiti crescenti. <text:span text:style-name="T1">Fonte:</text:span> cardpack-spec v0.2.0 (assente in DECK# v0.1). <text:span text:style-name="T1">Motivazione:</text:span> il sistema deve essere accessibile con il minimo materiale ma non fingere che tutti i giochi abbiano gli stessi requisiti. La distinzione è una dichiarazione di scope, non una gerarchia.</text:p>
      <text:p text:style-name="Horizontal_20_Line"/>
      <text:h text:style-name="Heading_20_2" text:outline-level="2"><text:bookmark-start text:name="dc-13-sezione-responsabilità-del-designer"/>DC-13 — Sezione “Responsabilità del designer”<text:bookmark-end text:name="dc-13-sezione-responsabilità-del-designer"/></text:h>
      <text:p text:style-name="First_20_paragraph"><text:span text:style-name="T1">Decisione:</text:span> lista esplicita di ciò che ogni gioco costruito su DECK# deve specificare. <text:span text:style-name="T1">Motivazione:</text:span> senza questa sezione un designer non sa dove inizia il suo lavoro. La lista delimita l’interfaccia tra specifica e gioco.</text:p>
      <text:p text:style-name="Horizontal_20_Line"/>
      <text:h text:style-name="Heading_20_2" text:outline-level="2"><text:bookmark-start text:name="dc-14-licenza-cc-by-4.0"/>DC-14 — Licenza CC BY 4.0<text:bookmark-end text:name="dc-14-licenza-cc-by-4.0"/></text:h>
      <text:p text:style-name="First_20_paragraph"><text:span text:style-name="T1">Decisione:</text:span> Creative Commons Attribution 4.0 International. <text:span text:style-name="T1">Alternative considerate:</text:span> CC0, CC BY-SA, licenza proprietaria con permesso d’uso. <text:span text:style-name="T1">Motivazione:</text:span> CC BY 4.0 bilancia apertura e attribuzione. Permette uso commerciale, non impone copyleft sui derivati, richiede solo citazione della fonte. CC0 avrebbe rinunciato a qualsiasi tracciabilità dell’ecosistema. CC BY-SA avrebbe creato frizioni per giochi commerciali.</text:p>
      <text:p text:style-name="Horizontal_20_Line"/>
      <text:h text:style-name="Heading_20_2" text:outline-level="2"><text:bookmark-start text:name="dc-15-layer-unico-strutturale"/>DC-15 — Layer unico strutturale<text:bookmark-end text:name="dc-15-layer-unico-strutturale"/></text:h>
      <text:p text:style-name="First_20_paragraph"><text:span text:style-name="T1">Decisione:</text:span> i glifi sono strutturali per definizione. Non esiste un layer semantico separato aggiunto dal gioco — il designer interpreta i glifi strutturali, non aggiunge un layer proprio. <text:span text:style-name="T1">Alternativa scartata:</text:span> modello a due layer (strutturale DECK# + semantico per gioco). <text:span text:style-name="T1">Motivazione:</text:span> la distinzione layer strutturale / layer semantico è concettuale, non fisica. Sul mazzo c’è un solo strato di annotazione. La semantica è un’operazione di lettura, non di scrittura.</text:p>
      <text:p text:style-name="Horizontal_20_Line"/>
      <text:h text:style-name="Heading_20_2" text:outline-level="2"><text:bookmark-start text:name="dc-16-tre-dimensioni-strutturali-per-carta"/>DC-16 — Tre dimensioni strutturali per carta<text:bookmark-end text:name="dc-16-tre-dimensioni-strutturali-per-carta"/></text:h>
      <text:p text:style-name="First_20_paragraph"><text:span text:style-name="T1">Decisione:</text:span> ogni carta è definita da tre dimensioni: Connettività (pattern di bordi aperti tra 15 configurazioni), Primario (glifo in zona S), Modificatore (glifo in angolo NE). Gerarchia posizionale, non semantica: Primario + Modificatore identici (es. ×/×) sono combinazioni legittime. <text:span text:style-name="T1">Motivazione:</text:span> tre dimensioni indipendenti creano uno spazio combinatorio (15 × 7 × 7 = 735 configurazioni teoriche) molto più ricco dei 52 slot necessari, garantendo libertà di design nella distribuzione.</text:p>
      <text:p text:style-name="Horizontal_20_Line"/>
      <text:h text:style-name="Heading_20_2" text:outline-level="2"><text:bookmark-start text:name="dc-17-marcatori-di-quadrante-universali"/>DC-17 — Marcatori di quadrante universali<text:bookmark-end text:name="dc-17-marcatori-di-quadrante-universali"/></text:h>
      <text:p text:style-name="First_20_paragraph"><text:span text:style-name="T1">Decisione:</text:span> i marcatori di quadrante sono presenti su tutte le 52 carte regolari. Assenti sui Jolly. <text:span text:style-name="T1">Alternativa scartata:</text:span> presenza variabile come dimensione della matrice. <text:span text:style-name="T1">Motivazione:</text:span> la capacità spaziale uniforme semplifica l’annotazione e sposta la gestione della capacità al gioco, che può ignorarla, usarla parzialmente o sfruttarla integralmente.</text:p>
      <text:p text:style-name="Horizontal_20_Line"/>
      <text:h text:style-name="Heading_20_2" text:outline-level="2"><text:bookmark-start text:name="dc-18-zone-primario-in-s-modificatore-in-ne"/>DC-18 — Zone: Primario in S, Modificatore in NE<text:bookmark-end text:name="dc-18-zone-primario-in-s-modificatore-in-ne"/></text:h>
      <text:p text:style-name="First_20_paragraph"><text:span text:style-name="T1">Decisione:</text:span> glifo primario in zona S (interno, bordo medio inferiore) con speculare in N; modificatore in angolo NE con speculare in SW. Centro non occupato da annotazioni DECK#. <text:span text:style-name="T1">Alternativa scartata:</text:span> primario al centro (bloccato dai pip sulle carte numerali). <text:span text:style-name="T1">Motivazione:</text:span> zona S è visibile quando le carte sono tenute a ventaglio; è pulita e separata dai pip per tutte le carte. NE è il secondo angolo più visibile. Il centro resta leggibile per i pip e disponibile come spazio visivo neutro.</text:p>
      <text:p text:style-name="Horizontal_20_Line"/>
      <text:h text:style-name="Heading_20_2" text:outline-level="2"><text:bookmark-start text:name="dc-19-matrice-di-annotazione-come-artefatto-di-design"/>DC-19 — Matrice di annotazione come artefatto di design<text:bookmark-end text:name="dc-19-matrice-di-annotazione-come-artefatto-di-design"/></text:h>
      <text:p text:style-name="First_20_paragraph"><text:span text:style-name="T1">Decisione:</text:span> la distribuzione di connettività e glifi sulle 52 carte è un artefatto authored, ortogonale a valore/seme/colore per costruzione deliberata. Non esiste formula algoritmica che colleghi proprietà del substrato all’annotazione strutturale. <text:span text:style-name="T1">Motivazione:</text:span> l’ortogonalità per formula richiederebbe di usare valore/seme come indice, re-encodandoli implicitamente. L’ortogonalità per design è più robusta: nessuna correlazione sistematica, varietà topologica controllata.</text:p>
      <text:p text:style-name="Horizontal_20_Line"/>
      <text:h text:style-name="Heading_20_2" text:outline-level="2"><text:bookmark-start text:name="dc-20-annotazione-pre-gioco-come-standard-assoluto"/>DC-20 — Annotazione pre-gioco come standard assoluto<text:bookmark-end text:name="dc-20-annotazione-pre-gioco-come-standard-assoluto"/></text:h>
      <text:p text:style-name="First_20_paragraph"><text:span text:style-name="T1">Decisione:</text:span> il mazzo DECK# viene annotato integralmente prima di qualsiasi sessione. Nessuna annotazione in gioco per il layer strutturale. <text:span text:style-name="T1">Motivazione:</text:span> coerente con il modello del mazzo come artefatto fisso. Rimuove una fonte di ambiguità dalla sezione “Responsabilità del designer” — non è una scelta del gioco, è un vincolo del sistema.</text:p>
      <text:p text:style-name="Horizontal_20_Line"/>
      <text:h text:style-name="Heading_20_2" text:outline-level="2"><text:bookmark-start text:name="dc-22-colore-dei-glifi-regola-contrastante"/>DC-22 — Colore dei glifi: regola contrastante<text:bookmark-end text:name="dc-22-colore-dei-glifi-regola-contrastante"/></text:h>
      <text:p text:style-name="First_20_paragraph"><text:span text:style-name="T1">Decisione:</text:span> glifi neri su carte rosse (♥/♦); glifi rossi su carte nere (♣/♠). Regola fissa, nessuna colonna colore nella matrice. <text:span text:style-name="T1">Alternative scartate:</text:span> (1) colore come asse semantico indipendente nella matrice — richiede distribuzione progettata e aggiunge complessità; (2) tutti i glifi in nero — perde leggibilità su carte nere. <text:span text:style-name="T1">Motivazione:</text:span> il colore contrastante è interamente derivabile dal seme (zero informazione differenziale nuova) ma massimizza la separazione visiva tra annotazione e substrato. La semplicità della regola è il valore principale: chiunque annoti il mazzo può ricavarla senza consultare la matrice.</text:p>
      <text:p text:style-name="Horizontal_20_Line"/>
      <text:h text:style-name="Heading_20_2" text:outline-level="2"><text:bookmark-start text:name="dc-21-convivenza-marcatore-di-quadrante-e-glifo-primario-in-zona-s"/>DC-21 — Convivenza marcatore di quadrante e glifo primario in zona S<text:bookmark-end text:name="dc-21-convivenza-marcatore-di-quadrante-e-glifo-primario-in-zona-s"/></text:h>
      <text:p text:style-name="First_20_paragraph"><text:span text:style-name="T1">SUPERATA in v0.6 da DC-07 rev.</text:span> I marcatori di quadrante migrano sul dorso: la coesistenza con il glifo primario in zona S non si pone più. La sezione 5.1 della spec (diagramma di posizionamento) è stata rimossa.</text:p>
      <text:p text:style-name="Horizontal_20_Line"/>
      <text:h text:style-name="Heading_20_2" text:outline-level="2"><text:bookmark-start text:name="decisioni-aperte"/>Decisioni aperte<text:bookmark-end text:name="decisioni-aperte"/></text:h>
      <text:p text:style-name="First_20_paragraph"><text:span text:style-name="T1">DA-01 — CHIUSA</text:span> (DC-16, DC-18): la coesistenza di più glifi nella stessa zona non si pone — ogni zona ha al massimo un glifo DECK#.</text:p>
      <text:p text:style-name="Text_20_body"><text:span text:style-name="T1">DA-02 — Notazione per subset di mazzo:</text:span> sistema standard per documentare quale sottoinsieme viene usato (es. <text:span text:style-name="Source_Text">DECK#/♠A-6</text:span>).</text:p>
      <text:p text:style-name="Text_20_body"><text:span text:style-name="T1">DA-03 — CHIUSA:</text:span> compatibilità con mazzi non standard fuori scope per definizione. Il prerequisito di DECK# è un mazzo francese/poker standard (52 + 2 Jolly). Mazzi spagnoli, tedeschi, tarocchi non soddisfano il substrato ereditato della sezione 3.</text:p>
      <text:p text:style-name="Text_20_body"><text:span text:style-name="T1">DA-04 — CHIUSA (rigettata):</text:span> i marcatori di quadrante sul dorso sarebbero utili in tile mode con carta coperta, ma il pattern del dorso varia da mazzo a mazzo in modo imprevedibile — su dorsi con motivi fitti i marcatori sarebbero illeggibili o nascosti. DC-07 (dorso non annotabile) rimane valido senza eccezioni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Note di Design DECK#</dc:title>
    <dc:description/>
    <dc:subject/>
    <meta:keyword/>
    <dc:language>it</dc:language>
    <meta:initial-creator>Roberto Bisceglie</meta:initial-creator>
    <dc:creator>Roberto Bisceglie</dc:creator>
    <meta:creation-date>2026-07-01T07:30:38Z</meta:creation-date>
    <dc:date>2026-07-01T07:30:38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Traccia delle decisioni di progettazione</meta:user-defined>
    <meta:user-defined meta:name="toc-title" meta:value-type="string">Indice</meta:user-defined>
    <meta:user-defined meta:name="version" meta:value-type="string">1</meta:user-defined>
  </office:meta>
</office:document-meta>
</file>