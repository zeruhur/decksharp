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Text_20_body" style:list-style-name="L3">
      <style:paragraph-properties fo:margin-top="0in" fo:margin-bottom="0in"/>
    </style:style>
    <style:style style:name="P10" style:family="paragraph" style:parent-style-name="Text_20_body" style:list-style-name="L4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21845*"/>
    </style:style>
    <style:style style:name="Table1.B" style:family="table-column">
      <style:table-column-properties style:rel-column-width="21845*"/>
    </style:style>
    <style:style style:name="Table1.C" style:family="table-column">
      <style:table-column-properties style:rel-column-width="21845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3.D" style:family="table-column"/>
  </office:automatic-styles>
  <office:body>
    <office:text>
      <text:p text:style-name="Title">Guida all’Annotazione DECK#</text:p>
      <text:p text:style-name="Subtitle">Come preparare fisicamente il tuo mazzo DECK#</text:p>
      <text:p text:style-name="Author">Roberto Bisceglie</text:p>
      <text:p text:style-name="Date">2026-07-01</text:p>
      <text:table-of-content>
        <text:table-of-content-source text:outline-level="3">
          <text:index-title-template text:style-name="Contents_20_Heading">Indice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version: 0.1.0 · status: draft</text:p>
      <text:p text:style-name="Horizontal_20_Line"/>
      <text:h text:style-name="Heading_20_2" text:outline-level="2"><text:bookmark-start text:name="cosa-serve"/>Cosa serve<text:bookmark-end text:name="cosa-serve"/></text:h>
      <text:list text:style-name="L1">
        <text:list-item>
          <text:p text:style-name="P1">Un mazzo di carte francesi standard (52 carte + 2 Jolly)</text:p>
        </text:list-item>
        <text:list-item>
          <text:p text:style-name="P1">Un pennarello permanente nero a punta fine</text:p>
        </text:list-item>
        <text:list-item>
          <text:p text:style-name="P1">Un pennarello permanente rosso a punta fine</text:p>
        </text:list-item>
        <text:list-item>
          <text:p text:style-name="P1">La matrice di annotazione (sezione 13 della specifica, o il file <text:span text:style-name="Source_Text">decksharp_matrix.csv</text:span>)</text:p>
        </text:list-item>
      </text:list>
      <text:p text:style-name="First_20_paragraph">Tempo stimato: 15–20 minuti.</text:p>
      <text:p text:style-name="Horizontal_20_Line"/>
      <text:h text:style-name="Heading_20_2" text:outline-level="2"><text:bookmark-start text:name="prima-di-iniziare"/>Prima di iniziare<text:bookmark-end text:name="prima-di-iniziare"/></text:h>
      <text:p text:style-name="First_20_paragraph">Il mazzo DECK# si annota <text:span text:style-name="T1">una volta sola</text:span>, prima di qualsiasi partita. Le annotazioni sono permanenti. Non ci sono annotazioni da fare durante il gioco: gli stati variabili si gestiscono con token fisici (dadi, segnalini, monete).</text:p>
      <text:p text:style-name="Text_20_body">Ogni carta riceve quattro tipi di annotazione, in zone distinte: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Table_20_Heading">Annotazione</text:p>
            </table:table-cell>
            <table:table-cell table:style-name="TableHeaderRowCell" office:value-type="string">
              <text:p text:style-name="Table_20_Heading">Zona</text:p>
            </table:table-cell>
            <table:table-cell table:style-name="TableHeaderRowCell" office:value-type="string">
              <text:p text:style-name="Table_20_Heading">Strumento</text:p>
            </table:table-cell>
          </table:table-row>
        </table:table-header-rows>
        <table:table-row>
          <table:table-cell table:style-name="TableRowCell" office:value-type="string">
            <text:p text:style-name="Table_20_Contents">Marcatori di quadrante</text:p>
          </table:table-cell>
          <table:table-cell table:style-name="TableRowCell" office:value-type="string">
            <text:p text:style-name="Table_20_Contents">Dorso</text:p>
          </table:table-cell>
          <table:table-cell table:style-name="TableRowCell" office:value-type="string">
            <text:p text:style-name="Table_20_Contents">Pennarello nero</text:p>
          </table:table-cell>
        </table:table-row>
        <table:table-row>
          <table:table-cell table:style-name="TableRowCell" office:value-type="string">
            <text:p text:style-name="Table_20_Contents">Marcatori di connettività</text:p>
          </table:table-cell>
          <table:table-cell table:style-name="TableRowCell" office:value-type="string">
            <text:p text:style-name="Table_20_Contents">Bordi fisici (recto)</text:p>
          </table:table-cell>
          <table:table-cell table:style-name="TableRowCell" office:value-type="string">
            <text:p text:style-name="Table_20_Contents">Pennarello nero</text:p>
          </table:table-cell>
        </table:table-row>
        <table:table-row>
          <table:table-cell table:style-name="TableRowCell" office:value-type="string">
            <text:p text:style-name="Table_20_Contents">Punto di orientamento (polo nord)</text:p>
          </table:table-cell>
          <table:table-cell table:style-name="TableRowCell" office:value-type="string">
            <text:p text:style-name="Table_20_Contents">Angolo SE (recto)</text:p>
          </table:table-cell>
          <table:table-cell table:style-name="TableRowCell" office:value-type="string">
            <text:p text:style-name="Table_20_Contents">Pennarello nero</text:p>
          </table:table-cell>
        </table:table-row>
        <table:table-row>
          <table:table-cell table:style-name="TableRowCell" office:value-type="string">
            <text:p text:style-name="Table_20_Contents">Glifo primario + modificatore</text:p>
          </table:table-cell>
          <table:table-cell table:style-name="TableRowCell" office:value-type="string">
            <text:p text:style-name="Table_20_Contents">Zone S/N e NE/SW (recto)</text:p>
          </table:table-cell>
          <table:table-cell table:style-name="TableRowCell" office:value-type="string">
            <text:p text:style-name="Table_20_Contents">Nero o rosso (vedi sotto)</text:p>
          </table:table-cell>
        </table:table-row>
      </table:table>
      <text:p text:style-name="First_20_paragraph"><text:span text:style-name="T1">Regola cromatica:</text:span> il colore del glifo è sempre contrastante rispetto al seme della carta. - Carte rosse (♥ ♦) → glifi in <text:span text:style-name="T1">nero</text:span> - Carte nere (♣ ♠) → glifi in <text:span text:style-name="T1">rosso</text:span></text:p>
      <text:p text:style-name="Text_20_body">Il colore del glifo non è una scelta: si ricava automaticamente dal seme.</text:p>
      <text:p text:style-name="Horizontal_20_Line"/>
      <text:h text:style-name="Heading_20_2" text:outline-level="2"><text:bookmark-start text:name="preparazione-divisione-del-mazzo"/>Preparazione: divisione del mazzo<text:bookmark-end text:name="preparazione-divisione-del-mazzo"/></text:h>
      <text:p text:style-name="First_20_paragraph">Separa il mazzo in tre gruppi:</text:p>
      <text:list text:style-name="L2">
        <text:list-item>
          <text:p text:style-name="P2"><text:span text:style-name="T1">Carte rosse</text:span> (♥ ♦) — 26 carte</text:p>
        </text:list-item>
        <text:list-item>
          <text:p text:style-name="P2"><text:span text:style-name="T1">Carte nere</text:span> (♣ ♠) — 26 carte</text:p>
        </text:list-item>
        <text:list-item>
          <text:p text:style-name="P2"><text:span text:style-name="T1">Jolly</text:span> — 2 carte, messe da parte</text:p>
        </text:list-item>
      </text:list>
      <text:p text:style-name="First_20_paragraph">Lavora prima sulle <text:span text:style-name="T1">carte rosse</text:span>: richiedono solo il pennarello nero per l’intera annotazione. Procedi poi con le <text:span text:style-name="T1">carte nere</text:span>: richiedono il cambio di strumento solo nell’ultima fase (glifi in rosso). Affronta i <text:span text:style-name="T1">Jolly</text:span> alla fine — hanno un’annotazione minima e separata.</text:p>
      <text:p text:style-name="Horizontal_20_Line"/>
      <text:h text:style-name="Heading_20_2" text:outline-level="2"><text:bookmark-start text:name="fase-1-marcatori-di-quadrante-dorso"/>Fase 1 — Marcatori di quadrante (dorso)<text:bookmark-end text:name="fase-1-marcatori-di-quadrante-dorso"/></text:h>
      <text:p text:style-name="First_20_paragraph"><text:span text:style-name="T1">Strumento:</text:span> pennarello nero.</text:p>
      <text:p text:style-name="Text_20_body">Con le carte orientate sul dorso, traccia i marcatori di quadrante su tutte le 54 carte (rosse + nere + Jolly).</text:p>
      <text:p text:style-name="Text_20_body">I marcatori di quadrante sono identici su tutte le carte e indicano al giocatore il centro e i lati della carta quando è posata coperta sul tavolo. Scegli una delle due varianti e mantienila per tutto il mazzo:</text:p>
      <text:p text:style-name="Text_20_body"><text:span text:style-name="T1">Variante minima</text:span> — quattro segmenti corti che partono dal punto medio di ciascun bordo verso il centro, senza attraversarlo:</text:p>
      <text:p text:style-name="P3"><text:s text:c="6"/>|</text:p>
      <text:p text:style-name="P4"><text:s text:c="2"/>— <text:s text:c="4"/>—</text:p>
      <text:p text:style-name="P5"><text:s text:c="6"/>|</text:p>
      <text:p text:style-name="First_20_paragraph"><text:span text:style-name="T1">Variante estesa</text:span> — croce completa da bordo a bordo:</text:p>
      <text:p text:style-name="P6"><text:s text:c="6"/>|</text:p>
      <text:p text:style-name="P7"><text:s text:c="2"/>————+————</text:p>
      <text:p text:style-name="P8"><text:s text:c="6"/>|</text:p>
      <text:p text:style-name="First_20_paragraph">Lascia asciugare l’inchiostro prima di girare le carte.</text:p>
      <text:p text:style-name="Horizontal_20_Line"/>
      <text:h text:style-name="Heading_20_2" text:outline-level="2"><text:bookmark-start text:name="fase-2-marcatori-di-connettività-bordi"/>Fase 2 — Marcatori di connettività (bordi)<text:bookmark-end text:name="fase-2-marcatori-di-connettività-bordi"/></text:h>
      <text:p text:style-name="First_20_paragraph"><text:span text:style-name="T1">Strumento:</text:span> pennarello nero.</text:p>
      <text:p text:style-name="Text_20_body">Consulta la matrice di annotazione. Per ogni carta, la colonna <text:span text:style-name="T1">Connettività</text:span> indica quali bordi sono <text:span text:style-name="T1">aperti</text:span> (connessi). I bordi non elencati ricevono un <text:span text:style-name="T1">marcatore di muro</text:span>: una linea spessa tracciata lungo il margine bianco esterno della carta (~3–4 mm), sul recto.</text:p>
      <text:p text:style-name="Text_20_body"><text:span text:style-name="T1">Esempio:</text:span> se la matrice indica <text:span text:style-name="Source_Text">N+W</text:span>, i bordi Nord e Ovest sono aperti — non si toccano. I bordi Sud ed Est ricevono il marcatore di muro.</text:p>
      <text:p text:style-name="Text_20_body">Lascia qualche secondo di asciugatura tra una carta e l’altra prima di sovrapporle.</text:p>
      <text:p text:style-name="Horizontal_20_Line"/>
      <text:h text:style-name="Heading_20_2" text:outline-level="2"><text:bookmark-start text:name="fase-3-punto-di-orientamento-polo-nord"/>Fase 3 — Punto di orientamento (polo nord)<text:bookmark-end text:name="fase-3-punto-di-orientamento-polo-nord"/></text:h>
      <text:p text:style-name="First_20_paragraph"><text:span text:style-name="T1">Strumento:</text:span> pennarello nero.</text:p>
      <text:p text:style-name="Text_20_body">Traccia un piccolo punto <text:span text:style-name="Source_Text">•</text:span> nell’angolo estremo in basso a destra di ogni carta — la zona <text:span text:style-name="T1">SE</text:span> del recto. Questo punto rompe la simmetria verticale delle carte standard e indica il polo nord: il lato con l’indice pre-stampato in alto a sinistra (NW).</text:p>
      <text:p text:style-name="Text_20_body">Il punto va su tutte le 52 carte regolari e sui 2 Jolly.</text:p>
      <text:p text:style-name="Horizontal_20_Line"/>
      <text:h text:style-name="Heading_20_2" text:outline-level="2"><text:bookmark-start text:name="fase-4-glifi-primari-e-modificatori"/>Fase 4 — Glifi primari e modificatori<text:bookmark-end text:name="fase-4-glifi-primari-e-modificatori"/></text:h>
      <text:p text:style-name="First_20_paragraph"><text:span text:style-name="T1">Strumento:</text:span> pennarello nero per le carte rosse (♥ ♦) · pennarello rosso per le carte nere (♣ ♠).</text:p>
      <text:p text:style-name="Text_20_body">Consulta la matrice di annotazione. Per ogni carta, annota:</text:p>
      <text:list text:style-name="L3">
        <text:list-item>
          <text:p text:style-name="P9"><text:span text:style-name="T1">Glifo primario</text:span> nella zona <text:span text:style-name="T1">S</text:span> (bordo medio inferiore, interno alla carta) e il suo speculare capovolto in zona <text:span text:style-name="T1">N</text:span> (bordo medio superiore).</text:p>
        </text:list-item>
        <text:list-item>
          <text:p text:style-name="P9"><text:span text:style-name="T1">Glifo modificatore</text:span> nell’angolo <text:span text:style-name="T1">NE</text:span> (angolo superiore destro) e il suo speculare capovolto in zona <text:span text:style-name="T1">SW</text:span> (angolo inferiore sinistro).</text:p>
        </text:list-item>
      </text:list>
      <text:p text:style-name="First_20_paragraph">Le posizioni speculari (N e SW) servono a rendere la carta leggibile a ventaglio, indipendentemente dall’orientamento in mano.</text:p>
      <text:p text:style-name="Text_20_body">Il vocabolario DECK# comprende sette glifi: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Glifo</text:p>
            </table:table-cell>
            <table:table-cell table:style-name="TableHeaderRowCell" office:value-type="string">
              <text:p text:style-name="Table_20_Heading">Come si traccia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•</text:span> punto</text:p>
          </table:table-cell>
          <table:table-cell table:style-name="TableRowCell" office:value-type="string">
            <text:p text:style-name="Table_20_Contents">un punto</text:p>
          </table:table-cell>
        </table:table-row>
        <table:table-row>
          <table:table-cell table:style-name="TableRowCell" office:value-type="string">
            <text:p text:style-name="Table_20_Contents"><text:span text:style-name="Source_Text">—</text:span> linea</text:p>
          </table:table-cell>
          <table:table-cell table:style-name="TableRowCell" office:value-type="string">
            <text:p text:style-name="Table_20_Contents">una linea orizzontale</text:p>
          </table:table-cell>
        </table:table-row>
        <table:table-row>
          <table:table-cell table:style-name="TableRowCell" office:value-type="string">
            <text:p text:style-name="Table_20_Contents"><text:span text:style-name="Source_Text">+</text:span> croce</text:p>
          </table:table-cell>
          <table:table-cell table:style-name="TableRowCell" office:value-type="string">
            <text:p text:style-name="Table_20_Contents">due linee perpendicolari</text:p>
          </table:table-cell>
        </table:table-row>
        <table:table-row>
          <table:table-cell table:style-name="TableRowCell" office:value-type="string">
            <text:p text:style-name="Table_20_Contents"><text:span text:style-name="Source_Text">×</text:span> diagonale</text:p>
          </table:table-cell>
          <table:table-cell table:style-name="TableRowCell" office:value-type="string">
            <text:p text:style-name="Table_20_Contents">due linee diagonali</text:p>
          </table:table-cell>
        </table:table-row>
        <table:table-row>
          <table:table-cell table:style-name="TableRowCell" office:value-type="string">
            <text:p text:style-name="Table_20_Contents"><text:span text:style-name="Source_Text">△</text:span> triangolo</text:p>
          </table:table-cell>
          <table:table-cell table:style-name="TableRowCell" office:value-type="string">
            <text:p text:style-name="Table_20_Contents">tre tratti</text:p>
          </table:table-cell>
        </table:table-row>
        <table:table-row>
          <table:table-cell table:style-name="TableRowCell" office:value-type="string">
            <text:p text:style-name="Table_20_Contents"><text:span text:style-name="Source_Text">○</text:span> cerchio</text:p>
          </table:table-cell>
          <table:table-cell table:style-name="TableRowCell" office:value-type="string">
            <text:p text:style-name="Table_20_Contents">un anello chiuso</text:p>
          </table:table-cell>
        </table:table-row>
        <table:table-row>
          <table:table-cell table:style-name="TableRowCell" office:value-type="string">
            <text:p text:style-name="Table_20_Contents"><text:span text:style-name="Source_Text">□</text:span> quadrato</text:p>
          </table:table-cell>
          <table:table-cell table:style-name="TableRowCell" office:value-type="string">
            <text:p text:style-name="Table_20_Contents">quattro tratti</text:p>
          </table:table-cell>
        </table:table-row>
      </table:table>
      <text:p text:style-name="Horizontal_20_Line"/>
      <text:h text:style-name="Heading_20_2" text:outline-level="2"><text:bookmark-start text:name="eccezione-i-jolly"/>Eccezione: i Jolly<text:bookmark-end text:name="eccezione-i-jolly"/></text:h>
      <text:p text:style-name="First_20_paragraph">I due Jolly ricevono il <text:span text:style-name="T1">marcatore di quadrante</text:span> sul dorso (Fase 1, identico alle 52 carte regolari) e il <text:span text:style-name="T1">punto di orientamento</text:span> in zona SE (Fase 3). Nessun marcatore di connettività, nessun glifo primario, nessun modificatore.</text:p>
      <text:p text:style-name="Text_20_body">Sono variabili non istanziate: ogni gioco decide se e come usarli.</text:p>
      <text:p text:style-name="Horizontal_20_Line"/>
      <text:h text:style-name="Heading_20_2" text:outline-level="2"><text:bookmark-start text:name="schema-riepilogativo-per-carta"/>Schema riepilogativo per carta<text:bookmark-end text:name="schema-riepilogativo-per-carta"/>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>
            <table:table-cell table:style-name="TableHeaderRowCell" office:value-type="string">
              <text:p text:style-name="Table_20_Heading">Elemento</text:p>
            </table:table-cell>
            <table:table-cell table:style-name="TableHeaderRowCell" office:value-type="string">
              <text:p text:style-name="Table_20_Heading">Posizione</text:p>
            </table:table-cell>
            <table:table-cell table:style-name="TableHeaderRowCell" office:value-type="string">
              <text:p text:style-name="Table_20_Heading">52 carte regolari</text:p>
            </table:table-cell>
            <table:table-cell table:style-name="TableHeaderRowCell" office:value-type="string">
              <text:p text:style-name="Table_20_Heading">2 Jolly</text:p>
            </table:table-cell>
          </table:table-row>
        </table:table-header-rows>
        <table:table-row>
          <table:table-cell table:style-name="TableRowCell" office:value-type="string">
            <text:p text:style-name="Table_20_Contents">Marcatori di quadrante</text:p>
          </table:table-cell>
          <table:table-cell table:style-name="TableRowCell" office:value-type="string">
            <text:p text:style-name="Table_20_Contents">Dorso</text:p>
          </table:table-cell>
          <table:table-cell table:style-name="TableRowCell" office:value-type="string">
            <text:p text:style-name="Table_20_Contents">✓</text:p>
          </table:table-cell>
          <table:table-cell table:style-name="TableRowCell" office:value-type="string">
            <text:p text:style-name="Table_20_Contents">✓</text:p>
          </table:table-cell>
        </table:table-row>
        <table:table-row>
          <table:table-cell table:style-name="TableRowCell" office:value-type="string">
            <text:p text:style-name="Table_20_Contents">Marcatori di connettività</text:p>
          </table:table-cell>
          <table:table-cell table:style-name="TableRowCell" office:value-type="string">
            <text:p text:style-name="Table_20_Contents">Bordi recto</text:p>
          </table:table-cell>
          <table:table-cell table:style-name="TableRowCell" office:value-type="string">
            <text:p text:style-name="Table_20_Contents">✓ (da matrice)</text:p>
          </table:table-cell>
          <table:table-cell table:style-name="TableRowCell" office:value-type="string">
            <text:p text:style-name="Table_20_Contents">—</text:p>
          </table:table-cell>
        </table:table-row>
        <table:table-row>
          <table:table-cell table:style-name="TableRowCell" office:value-type="string">
            <text:p text:style-name="Table_20_Contents">Punto polo nord</text:p>
          </table:table-cell>
          <table:table-cell table:style-name="TableRowCell" office:value-type="string">
            <text:p text:style-name="Table_20_Contents">Angolo SE recto</text:p>
          </table:table-cell>
          <table:table-cell table:style-name="TableRowCell" office:value-type="string">
            <text:p text:style-name="Table_20_Contents">✓</text:p>
          </table:table-cell>
          <table:table-cell table:style-name="TableRowCell" office:value-type="string">
            <text:p text:style-name="Table_20_Contents">✓</text:p>
          </table:table-cell>
        </table:table-row>
        <table:table-row>
          <table:table-cell table:style-name="TableRowCell" office:value-type="string">
            <text:p text:style-name="Table_20_Contents">Glifo primario</text:p>
          </table:table-cell>
          <table:table-cell table:style-name="TableRowCell" office:value-type="string">
            <text:p text:style-name="Table_20_Contents">Zone S + N recto</text:p>
          </table:table-cell>
          <table:table-cell table:style-name="TableRowCell" office:value-type="string">
            <text:p text:style-name="Table_20_Contents">✓ (da matrice)</text:p>
          </table:table-cell>
          <table:table-cell table:style-name="TableRowCell" office:value-type="string">
            <text:p text:style-name="Table_20_Contents">—</text:p>
          </table:table-cell>
        </table:table-row>
        <table:table-row>
          <table:table-cell table:style-name="TableRowCell" office:value-type="string">
            <text:p text:style-name="Table_20_Contents">Glifo modificatore</text:p>
          </table:table-cell>
          <table:table-cell table:style-name="TableRowCell" office:value-type="string">
            <text:p text:style-name="Table_20_Contents">Zone NE + SW recto</text:p>
          </table:table-cell>
          <table:table-cell table:style-name="TableRowCell" office:value-type="string">
            <text:p text:style-name="Table_20_Contents">✓ (da matrice)</text:p>
          </table:table-cell>
          <table:table-cell table:style-name="TableRowCell" office:value-type="string">
            <text:p text:style-name="Table_20_Contents">—</text:p>
          </table:table-cell>
        </table:table-row>
      </table:table>
      <text:p text:style-name="Horizontal_20_Line"/>
      <text:h text:style-name="Heading_20_2" text:outline-level="2"><text:bookmark-start text:name="come-leggere-la-matrice-di-annotazione"/>Come leggere la matrice di annotazione<text:bookmark-end text:name="come-leggere-la-matrice-di-annotazione"/></text:h>
      <text:p text:style-name="First_20_paragraph">La matrice elenca tutte le 54 carte con tre informazioni:</text:p>
      <text:list text:style-name="L4">
        <text:list-item>
          <text:p text:style-name="P10"><text:span text:style-name="T1">Connettività:</text:span> i bordi aperti, in notazione N/S/E/W separati da <text:span text:style-name="Source_Text">+</text:span>. I bordi non elencati ricevono il marcatore di muro.</text:p>
        </text:list-item>
        <text:list-item>
          <text:p text:style-name="P10"><text:span text:style-name="T1">Primario:</text:span> il glifo da tracciare in zona S (e N speculare).</text:p>
        </text:list-item>
        <text:list-item>
          <text:p text:style-name="P10"><text:span text:style-name="T1">Modificatore:</text:span> il glifo da tracciare in zona NE (e SW speculare).</text:p>
        </text:list-item>
      </text:list>
      <text:p text:style-name="First_20_paragraph">Il colore dei glifi non è nella matrice perché si ricava sempre dal seme: nero per ♥/♦, rosso per ♣/♠.</text:p>
      <text:p text:style-name="Horizontal_20_Line"/>
      <text:p text:style-name="First_20_paragraph">DECK#</text:p>
      <text:p text:style-name="Text_20_body">© 2026 Roberto Bisceglie</text:p>
      <text:p text:style-name="Text_20_body">This work is licensed under Creative Commons Attribution-ShareAlike 4.0 International. To view a copy of this license, visit https://creativecommons.org/licenses/by-sa/4.0/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it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Caption" style:parent-style-name="Caption"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 fo:language="i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 fo:language="it"/>
    </style:style>
    <style:style style:family="text" style:name="Highlighted">
      <style:text-properties fo:background-color="#ffff38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  <style:style style:name="KeywordTok" style:family="text">
      <style:text-properties fo:color="#003b4f" fo:font-weight="bold"/>
    </style:style>
    <style:style style:name="DataTypeTok" style:family="text">
      <style:text-properties fo:color="#ad0000"/>
    </style:style>
    <style:style style:name="DecValTok" style:family="text">
      <style:text-properties fo:color="#ad0000"/>
    </style:style>
    <style:style style:name="BaseNTok" style:family="text">
      <style:text-properties fo:color="#ad0000"/>
    </style:style>
    <style:style style:name="FloatTok" style:family="text">
      <style:text-properties fo:color="#ad0000"/>
    </style:style>
    <style:style style:name="ConstantTok" style:family="text">
      <style:text-properties fo:color="#8f5902"/>
    </style:style>
    <style:style style:name="CharTok" style:family="text">
      <style:text-properties fo:color="#20794d"/>
    </style:style>
    <style:style style:name="SpecialCharTok" style:family="text">
      <style:text-properties fo:color="#5e5e5e"/>
    </style:style>
    <style:style style:name="StringTok" style:family="text">
      <style:text-properties fo:color="#20794d"/>
    </style:style>
    <style:style style:name="VerbatimStringTok" style:family="text">
      <style:text-properties fo:color="#20794d"/>
    </style:style>
    <style:style style:name="SpecialStringTok" style:family="text">
      <style:text-properties fo:color="#20794d"/>
    </style:style>
    <style:style style:name="ImportTok" style:family="text">
      <style:text-properties fo:color="#00769e"/>
    </style:style>
    <style:style style:name="CommentTok" style:family="text">
      <style:text-properties fo:color="#5e5e5e"/>
    </style:style>
    <style:style style:name="DocumentationTok" style:family="text">
      <style:text-properties fo:color="#5e5e5e" fo:font-style="italic"/>
    </style:style>
    <style:style style:name="AnnotationTok" style:family="text">
      <style:text-properties fo:color="#5e5e5e"/>
    </style:style>
    <style:style style:name="CommentVarTok" style:family="text">
      <style:text-properties fo:color="#5e5e5e" fo:font-style="italic"/>
    </style:style>
    <style:style style:name="OtherTok" style:family="text">
      <style:text-properties fo:color="#003b4f"/>
    </style:style>
    <style:style style:name="FunctionTok" style:family="text">
      <style:text-properties fo:color="#4758ab"/>
    </style:style>
    <style:style style:name="VariableTok" style:family="text">
      <style:text-properties fo:color="#111111"/>
    </style:style>
    <style:style style:name="ControlFlowTok" style:family="text">
      <style:text-properties fo:color="#003b4f" fo:font-weight="bold"/>
    </style:style>
    <style:style style:name="OperatorTok" style:family="text">
      <style:text-properties fo:color="#5e5e5e"/>
    </style:style>
    <style:style style:name="BuiltInTok" style:family="text">
      <style:text-properties fo:color="#003b4f"/>
    </style:style>
    <style:style style:name="ExtensionTok" style:family="text">
      <style:text-properties fo:color="#003b4f"/>
    </style:style>
    <style:style style:name="PreprocessorTok" style:family="text">
      <style:text-properties fo:color="#ad0000"/>
    </style:style>
    <style:style style:name="AttributeTok" style:family="text">
      <style:text-properties fo:color="#657422"/>
    </style:style>
    <style:style style:name="RegionMarkerTok" style:family="text">
      <style:text-properties fo:color="#003b4f"/>
    </style:style>
    <style:style style:name="InformationTok" style:family="text">
      <style:text-properties fo:color="#5e5e5e"/>
    </style:style>
    <style:style style:name="WarningTok" style:family="text">
      <style:text-properties fo:color="#5e5e5e" fo:font-style="italic"/>
    </style:style>
    <style:style style:name="AlertTok" style:family="text">
      <style:text-properties fo:color="#ad0000"/>
    </style:style>
    <style:style style:name="ErrorTok" style:family="text">
      <style:text-properties fo:color="#ad0000"/>
    </style:style>
    <style:style style:name="NormalTok" style:family="text">
      <style:text-properties fo:color="#003b4f"/>
    </style:style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8.3</meta:generator>
    <dc:title>Guida all’Annotazione DECK#</dc:title>
    <dc:description/>
    <dc:subject/>
    <meta:keyword/>
    <dc:language>it</dc:language>
    <meta:initial-creator>Roberto Bisceglie</meta:initial-creator>
    <dc:creator>Roberto Bisceglie</dc:creator>
    <meta:creation-date>2026-07-01T07:45:50Z</meta:creation-date>
    <dc:date>2026-07-01T07:45:50Z</dc:date>
    <meta:user-defined meta:name="authors" meta:value-type="string"/>
    <meta:user-defined meta:name="biblio-config" meta:value-type="string">True</meta:user-defined>
    <meta:user-defined meta:name="brand" meta:value-type="string">../../_brand.yml</meta:user-defined>
    <meta:user-defined meta:name="by-author" meta:value-type="string"/>
    <meta:user-defined meta:name="cover-logo" meta:value-type="string">../assets/logo.svg</meta:user-defined>
    <meta:user-defined meta:name="date" meta:value-type="string">2026-07-01</meta:user-defined>
    <meta:user-defined meta:name="engines" meta:value-type="string"/>
    <meta:user-defined meta:name="header-includes" meta:value-type="string"/>
    <meta:user-defined meta:name="include-after" meta:value-type="string"/>
    <meta:user-defined meta:name="include-before" meta:value-type="string"/>
    <meta:user-defined meta:name="labels" meta:value-type="string"/>
    <meta:user-defined meta:name="subtitle" meta:value-type="string">Come preparare fisicamente il tuo mazzo DECK#</meta:user-defined>
    <meta:user-defined meta:name="toc-title" meta:value-type="string">Indice</meta:user-defined>
    <meta:user-defined meta:name="version" meta:value-type="string">1</meta:user-defined>
  </office:meta>
</office:document-meta>
</file>