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ECK# Design Notes</text:p>
      <text:p text:style-name="Subtitle">Design Decision Log</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7.0 · internal document</text:p>
      <text:p text:style-name="Horizontal_20_Line"/>
      <text:h text:style-name="Heading_20_2" text:outline-level="2"><text:bookmark-start text:name="dc-01-system-name-deck"/>DC-01 — System name: DECK<text:bookmark-end text:name="dc-01-system-name-deck"/></text:h>
      <text:p text:style-name="First_20_paragraph"><text:span text:style-name="T1">Decision:</text:span> the system is named DECK#. <text:span text:style-name="T1">Alternative considered:</text:span> Deckpack. <text:span text:style-name="T1">Rationale:</text:span> DECK# (from Greek: language, vocabulary) reflects the nature of the system — a shared vocabulary for communicating mechanical information. It is language-agnostic while being a non-neutral name, which is appropriate: the name is a meta-label, not a system component. Deckpack remains valid for potential physical editions or commercial derivatives.</text:p>
      <text:p text:style-name="Horizontal_20_Line"/>
      <text:h text:style-name="Heading_20_2" text:outline-level="2"><text:bookmark-start text:name="dc-02-base-deck-size-52-2-jokers"/>DC-02 — Base deck size: 52 + 2 Jokers<text:bookmark-end text:name="dc-02-base-deck-size-52-2-jokers"/></text:h>
      <text:p text:style-name="First_20_paragraph"><text:span text:style-name="T1">Decision:</text:span> 54 cards total. <text:span text:style-name="T1">Rationale:</text:span> Jokers are structurally distinct in the standard deck — the only cards without a suit or rank. Excluding them would waste a design resource. Advertising cards present in some decks are not standardized and are not part of the specification.</text:p>
      <text:p text:style-name="Horizontal_20_Line"/>
      <text:h text:style-name="Heading_20_2" text:outline-level="2"><text:bookmark-start text:name="dc-03-permanent-marking"/>DC-03 — Permanent marking<text:bookmark-end text:name="dc-03-permanent-marking"/></text:h>
      <text:p text:style-name="First_20_paragraph"><text:span text:style-name="T1">Decision:</text:span> annotations with permanent marker. <text:span text:style-name="T1">Alternatives considered:</text:span> erasable for all layers; mixed system. <text:span text:style-name="T1">Rationale:</text:span> permanent marking transforms each deck into a unique artifact. Variable states are tracked with physical tokens, which are already removable by nature. The mixed system is available as an optional practice for individual games but is not prescribed.</text:p>
      <text:p text:style-name="Horizontal_20_Line"/>
      <text:h text:style-name="Heading_20_2" text:outline-level="2"><text:bookmark-start text:name="dc-04-open-system-no-rank-function-mapping"/>DC-04 — Open system: no rank → function mapping<text:bookmark-end text:name="dc-04-open-system-no-rank-function-mapping"/></text:h>
      <text:p text:style-name="First_20_paragraph"><text:span text:style-name="T1">Decision:</text:span> DECK# does not assign mechanical functions by rank. <text:span text:style-name="T1">Discarded alternative:</text:span> cardpack-spec v0.2.0 had defined Space (A–6) / Resource (7–10) / Actor (J–Q–K) as a fixed partition. <text:span text:style-name="T1">Rationale:</text:span> that partition is the structure of a specific tactical game, not an open vocabulary. It blocks any game that wants to use an Ace as a character or a King as a territory. An open system does not prescribe what each card represents — each game built on top does that.</text:p>
      <text:p text:style-name="Horizontal_20_Line"/>
      <text:h text:style-name="Heading_20_2" text:outline-level="2"><text:bookmark-start text:name="dc-05-seven-primary-glyphs-closed-vocabulary"/>DC-05 — Seven primary glyphs (closed vocabulary)<text:bookmark-end text:name="dc-05-seven-primary-glyphs-closed-vocabulary"/></text:h>
      <text:p text:style-name="First_20_paragraph"><text:span text:style-name="T1">Decision:</text:span> exactly 7 glyphs: dot, line, cross, diagonal, triangle, circle, square. <text:span text:style-name="T1">Rationale:</text:span> they cover the primitive geometric shapes producible with 1–4 strokes. Sufficiently visually distinct from each other and from suits. The vocabulary is closed to guarantee interoperability — a glyph not in the list does not exist in DECK#. The asterisk from cardpack-spec v0.2.0 was excluded because visually ambiguous and motivated by a semantic role (Joker) that the specification must not pre-assign.</text:p>
      <text:p text:style-name="Horizontal_20_Line"/>
      <text:h text:style-name="Heading_20_2" text:outline-level="2"><text:bookmark-start text:name="dc-06-glyph-color-contrasting-rule"/>DC-06 — Glyph color: contrasting rule<text:bookmark-end text:name="dc-06-glyph-color-contrasting-rule"/></text:h>
      <text:p text:style-name="First_20_paragraph"><text:span text:style-name="T1">Original decision (v0.1–v0.6):</text:span> marker color is an independent semantic layer, orthogonal to the glyph; convention not prescribed. <text:span text:style-name="T1">Updated decision (v0.7):</text:span> glyph color follows a fixed contrasting rule — black glyphs on red cards (♥/♦), red glyphs on black cards (♣/♠). See DC-22. <text:span text:style-name="T1">Rationale for change:</text:span> a semantic axis that is “available but not prescribed” never enters the canonical annotation. The contrasting rule is simple, memorable, and guarantees high legibility on all cards without requiring a color column in the matrix.</text:p>
      <text:p text:style-name="Horizontal_20_Line"/>
      <text:h text:style-name="Heading_20_2" text:outline-level="2"><text:bookmark-start text:name="dc-07-back-exception-for-quadrant-markers"/>DC-07 — Back: exception for quadrant markers<text:bookmark-end text:name="dc-07-back-exception-for-quadrant-markers"/></text:h>
      <text:p text:style-name="First_20_paragraph"><text:span text:style-name="T1">Original decision (v0.1–v0.5):</text:span> back excluded from annotation. <text:span text:style-name="T1">Updated decision (v0.6):</text:span> the back of the 52 standard cards receives only quadrant markers. Two variants allowed: minimal (four short segments at midpoints) or extended (full <text:span text:style-name="Source_Text">+</text:span> cross). The choice is left to the annotator. Jokers do not receive quadrant markers on the back. <text:span text:style-name="T1">Rationale for exception:</text:span> quadrant markers are identical on all 52 standard cards — they reveal no differential information. The original rationale (preserving anonymity for fog of war) does not apply to uniform markers. The benefit is eliminating the coexistence of quadrant markers and the primary glyph in S zone (DA-01 / DC-21, now superseded).</text:p>
      <text:p text:style-name="Horizontal_20_Line"/>
      <text:h text:style-name="Heading_20_2" text:outline-level="2"><text:bookmark-start text:name="dc-08-north-pole-convention"/>DC-08 — North pole convention<text:bookmark-end text:name="dc-08-north-pole-convention"/></text:h>
      <text:p text:style-name="First_20_paragraph"><text:span text:style-name="T1">Decision:</text:span> north pole = side with index in canonical position (NW at top left). Dot in SE as orientation marker. <text:span text:style-name="T1">Problem:</text:span> cards have vertical symmetry for ergonomic reasons. With spatial elements, this must be explicitly broken. <text:span text:style-name="T1">Rationale:</text:span> the SE dot is the least invasive solution — it covers nothing, is asymmetric, requires one stroke. A fixed arrow would have introduced spatial semantics even for games without orientation.</text:p>
      <text:p text:style-name="Horizontal_20_Line"/>
      <text:h text:style-name="Heading_20_2" text:outline-level="2"><text:bookmark-start text:name="dc-09-symmetrical-placement-in-hand-mode"/>DC-09 — Symmetrical placement in hand mode<text:bookmark-end text:name="dc-09-symmetrical-placement-in-hand-mode"/></text:h>
      <text:p text:style-name="First_20_paragraph"><text:span text:style-name="T1">Decision:</text:span> annotations in two mirror positions — primary glyph in S zone with mirror in N; modifier in NE corner with mirror in SW. See DC-18 for specific zones. <text:span text:style-name="T1">Source:</text:span> cardpack-spec v0.2.0 (zones updated in DC-18). <text:span text:style-name="T1">Rationale:</text:span> standard ergonomic convention for card decks — indices are already duplicated and rotated for the same reason. Guarantees fan readability without additional rules.</text:p>
      <text:p text:style-name="Horizontal_20_Line"/>
      <text:h text:style-name="Heading_20_2" text:outline-level="2"><text:bookmark-start text:name="dc-10-quadrant-markers"/>DC-10 — Quadrant markers<text:bookmark-end text:name="dc-10-quadrant-markers"/></text:h>
      <text:p text:style-name="First_20_paragraph"><text:span text:style-name="T1">Decision:</text:span> present on the <text:span text:style-name="T1">back</text:span> of the 52 standard cards (migrated from front face in v0.6, see DC-07 rev.). Two variants: minimal (four short segments) or extended (<text:span text:style-name="Source_Text">+</text:span> cross). Absent on Jokers. <text:span text:style-name="T1">Source:</text:span> cardpack-spec v0.2.0 (universality established in DC-17; migration to back in DC-07 rev. v0.6). <text:span text:style-name="T1">Rationale:</text:span> on the front face, short segments were necessary to avoid covering pips. On the back, the extended variant (full cross) becomes viable without interference.</text:p>
      <text:p text:style-name="Text_20_body"><text:span text:style-name="T1">Revision v0.7.1 (2026-05-13):</text:span> extended to Jokers on the back as well. See DC-11 rev. for rationale.</text:p>
      <text:p text:style-name="Horizontal_20_Line"/>
      <text:h text:style-name="Heading_20_2" text:outline-level="2"><text:bookmark-start text:name="dc-11-jokers-as-uninstantiated-variables"/>DC-11 — Jokers as uninstantiated variables<text:bookmark-end text:name="dc-11-jokers-as-uninstantiated-variables"/></text:h>
      <text:p text:style-name="First_20_paragraph"><text:span text:style-name="T1">Decision:</text:span> Jokers receive only the SE dot (north pole). No primary glyph, no modifier, no connectivity markers, no quadrant markers. <text:span text:style-name="T1">Discarded alternative:</text:span> fixed asterisk in cardpack-spec v0.2.0. <text:span text:style-name="T1">Rationale:</text:span> the asterisk assigns Jokers a specific functional role before any game uses them. An open system leaves Jokers as neutral surfaces. Their absence from the inherited axes is already sufficient to distinguish them.</text:p>
      <text:p text:style-name="Text_20_body"><text:span text:style-name="T1">Revision v0.7.1 (2026-05-13):</text:span> Jokers receive quadrant markers on the back. The original rationale (Joker neutrality as a blank surface) applies to the front face, not the back: quadrant markers are uniform on all cards and convey no differential information. Their absence on Joker backs made them recognizable when face-down, compromising fog of war. The neutrality principle remains intact: the Joker is still free of pre-assigned semantics on the front face.</text:p>
      <text:p text:style-name="Horizontal_20_Line"/>
      <text:h text:style-name="Heading_20_2" text:outline-level="2"><text:bookmark-start text:name="dc-12-base-and-extended-profiles"/>DC-12 — Base and Extended profiles<text:bookmark-end text:name="dc-12-base-and-extended-profiles"/></text:h>
      <text:p text:style-name="First_20_paragraph"><text:span text:style-name="T1">Decision:</text:span> two profiles with increasing requirements. <text:span text:style-name="T1">Source:</text:span> cardpack-spec v0.2.0 (absent in DECK# v0.1). <text:span text:style-name="T1">Rationale:</text:span> the system must be accessible with minimal materials but should not pretend all games have the same requirements. The distinction is a scope declaration, not a hierarchy.</text:p>
      <text:p text:style-name="Horizontal_20_Line"/>
      <text:h text:style-name="Heading_20_2" text:outline-level="2"><text:bookmark-start text:name="dc-13-designer-responsibilities-section"/>DC-13 — “Designer responsibilities” section<text:bookmark-end text:name="dc-13-designer-responsibilities-section"/></text:h>
      <text:p text:style-name="First_20_paragraph"><text:span text:style-name="T1">Decision:</text:span> explicit list of what every game built on DECK# must specify. <text:span text:style-name="T1">Rationale:</text:span> without this section, a designer does not know where their work begins. The list delimits the interface between specification and game.</text:p>
      <text:p text:style-name="Horizontal_20_Line"/>
      <text:h text:style-name="Heading_20_2" text:outline-level="2"><text:bookmark-start text:name="dc-14-cc-by-4.0-license"/>DC-14 — CC BY 4.0 License<text:bookmark-end text:name="dc-14-cc-by-4.0-license"/></text:h>
      <text:p text:style-name="First_20_paragraph"><text:span text:style-name="T1">Decision:</text:span> Creative Commons Attribution 4.0 International. <text:span text:style-name="T1">Alternatives considered:</text:span> CC0, CC BY-SA, proprietary license with usage permission. <text:span text:style-name="T1">Rationale:</text:span> CC BY 4.0 balances openness and attribution. It permits commercial use, does not impose copyleft on derivatives, and requires only source citation. CC0 would have sacrificed any ecosystem traceability. CC BY-SA would have created friction for commercial games.</text:p>
      <text:p text:style-name="Horizontal_20_Line"/>
      <text:h text:style-name="Heading_20_2" text:outline-level="2"><text:bookmark-start text:name="dc-15-single-structural-layer"/>DC-15 — Single structural layer<text:bookmark-end text:name="dc-15-single-structural-layer"/></text:h>
      <text:p text:style-name="First_20_paragraph"><text:span text:style-name="T1">Decision:</text:span> glyphs are structural by definition. There is no separate semantic layer added by the game — the designer interprets the structural glyphs; they do not add their own layer. <text:span text:style-name="T1">Discarded alternative:</text:span> two-layer model (DECK# structural + game semantic). <text:span text:style-name="T1">Rationale:</text:span> the structural/semantic layer distinction is conceptual, not physical. Only one annotation layer exists on the deck. Semantics is a reading operation, not a writing one.</text:p>
      <text:p text:style-name="Horizontal_20_Line"/>
      <text:h text:style-name="Heading_20_2" text:outline-level="2"><text:bookmark-start text:name="dc-16-three-structural-dimensions-per-card"/>DC-16 — Three structural dimensions per card<text:bookmark-end text:name="dc-16-three-structural-dimensions-per-card"/></text:h>
      <text:p text:style-name="First_20_paragraph"><text:span text:style-name="T1">Decision:</text:span> each card is defined by three dimensions: Connectivity (open edge patterns across 15 configurations), Primary (glyph in S zone), Modifier (glyph in NE corner). Positional hierarchy, not semantic: identical Primary + Modifier (e.g., ×/×) are legitimate combinations. <text:span text:style-name="T1">Rationale:</text:span> three independent dimensions create a combinatorial space (15 × 7 × 7 = 735 theoretical configurations) far richer than the 52 slots needed, guaranteeing design freedom in distribution.</text:p>
      <text:p text:style-name="Horizontal_20_Line"/>
      <text:h text:style-name="Heading_20_2" text:outline-level="2"><text:bookmark-start text:name="dc-17-universal-quadrant-markers"/>DC-17 — Universal quadrant markers<text:bookmark-end text:name="dc-17-universal-quadrant-markers"/></text:h>
      <text:p text:style-name="First_20_paragraph"><text:span text:style-name="T1">Decision:</text:span> quadrant markers are present on all 52 standard cards. Absent on Jokers. <text:span text:style-name="T1">Discarded alternative:</text:span> variable presence as a matrix dimension. <text:span text:style-name="T1">Rationale:</text:span> uniform spatial capability simplifies annotation and shifts capacity management to the game, which can ignore it, use it partially, or exploit it fully.</text:p>
      <text:p text:style-name="Horizontal_20_Line"/>
      <text:h text:style-name="Heading_20_2" text:outline-level="2"><text:bookmark-start text:name="dc-18-zones-primary-in-s-modifier-in-ne"/>DC-18 — Zones: Primary in S, Modifier in NE<text:bookmark-end text:name="dc-18-zones-primary-in-s-modifier-in-ne"/></text:h>
      <text:p text:style-name="First_20_paragraph"><text:span text:style-name="T1">Decision:</text:span> primary glyph in S zone (internal, lower middle edge) with mirror in N; modifier in NE corner with mirror in SW. Center not occupied by DECK# annotations. <text:span text:style-name="T1">Discarded alternative:</text:span> primary at center (blocked by pips on number cards). <text:span text:style-name="T1">Rationale:</text:span> S zone is visible when cards are held in a fan; it is clean and separated from pips for all cards. NE is the second most visible corner. The center remains readable for pips and available as a neutral visual space.</text:p>
      <text:p text:style-name="Horizontal_20_Line"/>
      <text:h text:style-name="Heading_20_2" text:outline-level="2"><text:bookmark-start text:name="dc-19-annotation-matrix-as-design-artifact"/>DC-19 — Annotation matrix as design artifact<text:bookmark-end text:name="dc-19-annotation-matrix-as-design-artifact"/></text:h>
      <text:p text:style-name="First_20_paragraph"><text:span text:style-name="T1">Decision:</text:span> the distribution of connectivity and glyphs across 52 cards is an authored artifact, orthogonal to rank/suit/color by deliberate construction. No algorithmic formula connects substrate properties to structural annotation. <text:span text:style-name="T1">Rationale:</text:span> formula-based orthogonality would require using rank/suit as an index, implicitly re-encoding them. Design-based orthogonality is more robust: no systematic correlation, controlled topological variety.</text:p>
      <text:p text:style-name="Horizontal_20_Line"/>
      <text:h text:style-name="Heading_20_2" text:outline-level="2"><text:bookmark-start text:name="dc-20-pre-session-annotation-as-absolute-standard"/>DC-20 — Pre-session annotation as absolute standard<text:bookmark-end text:name="dc-20-pre-session-annotation-as-absolute-standard"/></text:h>
      <text:p text:style-name="First_20_paragraph"><text:span text:style-name="T1">Decision:</text:span> the DECK# deck is fully annotated before any session. No in-game annotation for the structural layer. <text:span text:style-name="T1">Rationale:</text:span> consistent with the deck-as-fixed-artifact model. Removes a source of ambiguity from the “Designer responsibilities” section — it is not a game choice, it is a system constraint.</text:p>
      <text:p text:style-name="Horizontal_20_Line"/>
      <text:h text:style-name="Heading_20_2" text:outline-level="2"><text:bookmark-start text:name="dc-22-glyph-color-contrasting-rule"/>DC-22 — Glyph color: contrasting rule<text:bookmark-end text:name="dc-22-glyph-color-contrasting-rule"/></text:h>
      <text:p text:style-name="First_20_paragraph"><text:span text:style-name="T1">Decision:</text:span> black glyphs on red cards (♥/♦); red glyphs on black cards (♣/♠). Fixed rule, no color column in the matrix. <text:span text:style-name="T1">Discarded alternatives:</text:span> (1) color as independent semantic axis in the matrix — requires designed distribution and adds complexity; (2) all glyphs in black — loses legibility on black cards. <text:span text:style-name="T1">Rationale:</text:span> contrasting color is entirely derivable from suit (zero new differential information) but maximizes visual separation between annotation and substrate. The rule’s simplicity is its primary value: anyone annotating the deck can derive it without consulting the matrix.</text:p>
      <text:p text:style-name="Horizontal_20_Line"/>
      <text:h text:style-name="Heading_20_2" text:outline-level="2"><text:bookmark-start text:name="dc-21-coexistence-of-quadrant-marker-and-primary-glyph-in-s-zone"/>DC-21 — Coexistence of quadrant marker and primary glyph in S zone<text:bookmark-end text:name="dc-21-coexistence-of-quadrant-marker-and-primary-glyph-in-s-zone"/></text:h>
      <text:p text:style-name="First_20_paragraph"><text:span text:style-name="T1">SUPERSEDED in v0.6 by DC-07 rev.</text:span> Quadrant markers migrate to the back: coexistence with the primary glyph in S zone is no longer an issue. Section 5.1 of the spec (placement diagram) has been removed.</text:p>
      <text:p text:style-name="Horizontal_20_Line"/>
      <text:h text:style-name="Heading_20_2" text:outline-level="2"><text:bookmark-start text:name="open-decisions"/>Open decisions<text:bookmark-end text:name="open-decisions"/></text:h>
      <text:p text:style-name="First_20_paragraph"><text:span text:style-name="T1">DA-01 — CLOSED</text:span> (DC-16, DC-18): coexistence of multiple glyphs in the same zone is not an issue — each zone holds at most one DECK# glyph.</text:p>
      <text:p text:style-name="Text_20_body"><text:span text:style-name="T1">DA-02 — Deck subset notation:</text:span> standard system for documenting which subset is used (e.g., <text:span text:style-name="Source_Text">DECK#/♠A–6</text:span>).</text:p>
      <text:p text:style-name="Text_20_body"><text:span text:style-name="T1">DA-03 — CLOSED:</text:span> compatibility with non-standard decks is out of scope by definition. DECK#’s prerequisite is a standard French/poker deck (52 + 2 Jokers). Spanish, German, and tarot decks do not satisfy the inherited substrate of section 3.</text:p>
      <text:p text:style-name="Text_20_body"><text:span text:style-name="T1">DA-04 — CLOSED (rejected):</text:span> quadrant markers on the back would be useful in tile mode with a face-down card, but the back pattern varies from deck to deck in unpredictable ways — on decks with dense patterns the markers would be illegible or hidden. DC-07 (back not annotatable) remains valid without exceptions.</text:p>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Design Notes</dc:title>
    <dc:description/>
    <dc:subject/>
    <meta:keyword/>
    <dc:language>en</dc:language>
    <meta:initial-creator>Roberto Bisceglie</meta:initial-creator>
    <dc:creator>Roberto Bisceglie</dc:creator>
    <meta:creation-date>2026-07-01T07:47:47Z</meta:creation-date>
    <dc:date>2026-07-01T07:47:47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Design Decision Log</meta:user-defined>
    <meta:user-defined meta:name="toc-title" meta:value-type="string">Table of contents</meta:user-defined>
    <meta:user-defined meta:name="version" meta:value-type="string">1</meta:user-defined>
  </office:meta>
</office:document-meta>
</file>