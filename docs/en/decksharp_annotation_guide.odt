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</office:automatic-styles>
  <office:body>
    <office:text>
      <text:p text:style-name="Title">DECK# Annotation Guide</text:p>
      <text:p text:style-name="Subtitle">How to physically prepare your DECK# deck</text:p>
      <text:p text:style-name="Author">Roberto Bisceglie</text:p>
      <text:p text:style-name="Date">2026-07-01</text:p>
      <text:table-of-content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1.0 · status: draft</text:p>
      <text:p text:style-name="Horizontal_20_Line"/>
      <text:h text:style-name="Heading_20_2" text:outline-level="2"><text:bookmark-start text:name="what-you-need"/>What you need<text:bookmark-end text:name="what-you-need"/></text:h>
      <text:list text:style-name="L1">
        <text:list-item>
          <text:p text:style-name="P1">A standard French-suited playing card deck (52 cards + 2 Jokers)</text:p>
        </text:list-item>
        <text:list-item>
          <text:p text:style-name="P1">A fine-tip black permanent marker</text:p>
        </text:list-item>
        <text:list-item>
          <text:p text:style-name="P1">A fine-tip red permanent marker</text:p>
        </text:list-item>
        <text:list-item>
          <text:p text:style-name="P1">The annotation matrix (section 13 of the specification, or the <text:span text:style-name="Source_Text">decksharp_matrix.csv</text:span> file)</text:p>
        </text:list-item>
      </text:list>
      <text:p text:style-name="First_20_paragraph">Estimated time: 15–20 minutes.</text:p>
      <text:p text:style-name="Horizontal_20_Line"/>
      <text:h text:style-name="Heading_20_2" text:outline-level="2"><text:bookmark-start text:name="before-you-begin"/>Before you begin<text:bookmark-end text:name="before-you-begin"/></text:h>
      <text:p text:style-name="First_20_paragraph">The DECK# deck is annotated <text:span text:style-name="T1">once</text:span>, before any play session. Annotations are permanent. There is no in-game annotation: variable states are managed with physical tokens (dice, tokens, coins).</text:p>
      <text:p text:style-name="Text_20_body">Each card receives four types of annotation, in distinct zone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nnotation</text:p>
            </table:table-cell>
            <table:table-cell table:style-name="TableHeaderRowCell" office:value-type="string">
              <text:p text:style-name="Table_20_Heading">Zone</text:p>
            </table:table-cell>
            <table:table-cell table:style-name="TableHeaderRowCell" office:value-type="string">
              <text:p text:style-name="Table_20_Heading">Tool</text:p>
            </table:table-cell>
          </table:table-row>
        </table:table-header-rows>
        <table:table-row>
          <table:table-cell table:style-name="TableRowCell" office:value-type="string">
            <text:p text:style-name="Table_20_Contents">Quadrant markers</text:p>
          </table:table-cell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Black marker</text:p>
          </table:table-cell>
        </table:table-row>
        <table:table-row>
          <table:table-cell table:style-name="TableRowCell" office:value-type="string">
            <text:p text:style-name="Table_20_Contents">Connectivity markers</text:p>
          </table:table-cell>
          <table:table-cell table:style-name="TableRowCell" office:value-type="string">
            <text:p text:style-name="Table_20_Contents">Physical edges (front face)</text:p>
          </table:table-cell>
          <table:table-cell table:style-name="TableRowCell" office:value-type="string">
            <text:p text:style-name="Table_20_Contents">Black marker</text:p>
          </table:table-cell>
        </table:table-row>
        <table:table-row>
          <table:table-cell table:style-name="TableRowCell" office:value-type="string">
            <text:p text:style-name="Table_20_Contents">Orientation dot (north pole)</text:p>
          </table:table-cell>
          <table:table-cell table:style-name="TableRowCell" office:value-type="string">
            <text:p text:style-name="Table_20_Contents">SE corner (front face)</text:p>
          </table:table-cell>
          <table:table-cell table:style-name="TableRowCell" office:value-type="string">
            <text:p text:style-name="Table_20_Contents">Black marker</text:p>
          </table:table-cell>
        </table:table-row>
        <table:table-row>
          <table:table-cell table:style-name="TableRowCell" office:value-type="string">
            <text:p text:style-name="Table_20_Contents">Primary glyph + modifier</text:p>
          </table:table-cell>
          <table:table-cell table:style-name="TableRowCell" office:value-type="string">
            <text:p text:style-name="Table_20_Contents">S/N and NE/SW zones (front face)</text:p>
          </table:table-cell>
          <table:table-cell table:style-name="TableRowCell" office:value-type="string">
            <text:p text:style-name="Table_20_Contents">Black or red (see below)</text:p>
          </table:table-cell>
        </table:table-row>
      </table:table>
      <text:p text:style-name="First_20_paragraph"><text:span text:style-name="T1">Color rule:</text:span> glyph color is always contrasting relative to the card’s suit. - Red cards (♥ ♦) → glyphs in <text:span text:style-name="T1">black</text:span> - Black cards (♣ ♠) → glyphs in <text:span text:style-name="T1">red</text:span></text:p>
      <text:p text:style-name="Text_20_body">Glyph color is not a choice: it is automatically derived from suit.</text:p>
      <text:p text:style-name="Horizontal_20_Line"/>
      <text:h text:style-name="Heading_20_2" text:outline-level="2"><text:bookmark-start text:name="preparation-sorting-the-deck"/>Preparation: sorting the deck<text:bookmark-end text:name="preparation-sorting-the-deck"/></text:h>
      <text:p text:style-name="First_20_paragraph">Separate the deck into three groups:</text:p>
      <text:list text:style-name="L2">
        <text:list-item>
          <text:p text:style-name="P2"><text:span text:style-name="T1">Red cards</text:span> (♥ ♦) — 26 cards</text:p>
        </text:list-item>
        <text:list-item>
          <text:p text:style-name="P2"><text:span text:style-name="T1">Black cards</text:span> (♣ ♠) — 26 cards</text:p>
        </text:list-item>
        <text:list-item>
          <text:p text:style-name="P2"><text:span text:style-name="T1">Jokers</text:span> — 2 cards, set aside</text:p>
        </text:list-item>
      </text:list>
      <text:p text:style-name="First_20_paragraph">Work first on <text:span text:style-name="T1">red cards</text:span>: they require only the black marker for all annotation. Then proceed to <text:span text:style-name="T1">black cards</text:span>: they require a tool switch only in the final phase (glyphs in red). Handle <text:span text:style-name="T1">Jokers</text:span> last — they have minimal, separate annotation.</text:p>
      <text:p text:style-name="Horizontal_20_Line"/>
      <text:h text:style-name="Heading_20_2" text:outline-level="2"><text:bookmark-start text:name="phase-1-quadrant-markers-back"/>Phase 1 — Quadrant markers (back)<text:bookmark-end text:name="phase-1-quadrant-markers-back"/></text:h>
      <text:p text:style-name="First_20_paragraph"><text:span text:style-name="T1">Tool:</text:span> black marker.</text:p>
      <text:p text:style-name="Text_20_body">With cards oriented face-down, draw quadrant markers on all 54 cards (red + black + Jokers).</text:p>
      <text:p text:style-name="Text_20_body">Quadrant markers are identical on all cards and indicate the center and sides of the card to the player when it is placed face-down on the table. Choose one of the two variants and keep it consistent throughout the deck:</text:p>
      <text:p text:style-name="Text_20_body"><text:span text:style-name="T1">Minimal variant</text:span> — four short segments starting from the midpoint of each edge toward the center, without crossing it:</text:p>
      <text:p text:style-name="P3"><text:s text:c="6"/>|</text:p>
      <text:p text:style-name="P4"><text:s text:c="2"/>— <text:s text:c="4"/>—</text:p>
      <text:p text:style-name="P5"><text:s text:c="6"/>|</text:p>
      <text:p text:style-name="First_20_paragraph"><text:span text:style-name="T1">Extended variant</text:span> — full cross from edge to edge:</text:p>
      <text:p text:style-name="P6"><text:s text:c="6"/>|</text:p>
      <text:p text:style-name="P7"><text:s text:c="2"/>————+————</text:p>
      <text:p text:style-name="P8"><text:s text:c="6"/>|</text:p>
      <text:p text:style-name="First_20_paragraph">Allow the ink to dry before flipping the cards.</text:p>
      <text:p text:style-name="Horizontal_20_Line"/>
      <text:h text:style-name="Heading_20_2" text:outline-level="2"><text:bookmark-start text:name="phase-2-connectivity-markers-edges"/>Phase 2 — Connectivity markers (edges)<text:bookmark-end text:name="phase-2-connectivity-markers-edges"/></text:h>
      <text:p text:style-name="First_20_paragraph"><text:span text:style-name="T1">Tool:</text:span> black marker.</text:p>
      <text:p text:style-name="Text_20_body">Consult the annotation matrix. For each card, the <text:span text:style-name="T1">Connectivity</text:span> column indicates which edges are <text:span text:style-name="T1">open</text:span> (connected). Edges not listed receive a <text:span text:style-name="T1">wall marker</text:span>: a thick line drawn along the external white margin of the card (~3–4 mm), on the front face.</text:p>
      <text:p text:style-name="Text_20_body"><text:span text:style-name="T1">Example:</text:span> if the matrix shows <text:span text:style-name="Source_Text">N+W</text:span>, the North and West edges are open — leave them unmarked. The South and East edges receive the wall marker.</text:p>
      <text:p text:style-name="Text_20_body">Allow a few seconds of drying time between cards before stacking them.</text:p>
      <text:p text:style-name="Horizontal_20_Line"/>
      <text:h text:style-name="Heading_20_2" text:outline-level="2"><text:bookmark-start text:name="phase-3-orientation-dot-north-pole"/>Phase 3 — Orientation dot (north pole)<text:bookmark-end text:name="phase-3-orientation-dot-north-pole"/></text:h>
      <text:p text:style-name="First_20_paragraph"><text:span text:style-name="T1">Tool:</text:span> black marker.</text:p>
      <text:p text:style-name="Text_20_body">Draw a small dot <text:span text:style-name="Source_Text">•</text:span> in the far lower right corner of each card — the <text:span text:style-name="T1">SE</text:span> zone of the front face. This dot breaks the vertical symmetry of standard cards and indicates the north pole: the side with the pre-printed index at top left (NW).</text:p>
      <text:p text:style-name="Text_20_body">The dot goes on all 52 standard cards and both Jokers.</text:p>
      <text:p text:style-name="Horizontal_20_Line"/>
      <text:h text:style-name="Heading_20_2" text:outline-level="2"><text:bookmark-start text:name="phase-4-primary-glyphs-and-modifiers"/>Phase 4 — Primary glyphs and modifiers<text:bookmark-end text:name="phase-4-primary-glyphs-and-modifiers"/></text:h>
      <text:p text:style-name="First_20_paragraph"><text:span text:style-name="T1">Tool:</text:span> black marker for red cards (♥ ♦) · red marker for black cards (♣ ♠).</text:p>
      <text:p text:style-name="Text_20_body">Consult the annotation matrix. For each card, annotate:</text:p>
      <text:list text:style-name="L3">
        <text:list-item>
          <text:p text:style-name="P9"><text:span text:style-name="T1">Primary glyph</text:span> in the <text:span text:style-name="T1">S</text:span> zone (lower middle edge, inside the card) and its rotated mirror in the <text:span text:style-name="T1">N</text:span> zone (upper middle edge).</text:p>
        </text:list-item>
        <text:list-item>
          <text:p text:style-name="P9"><text:span text:style-name="T1">Modifier glyph</text:span> in the <text:span text:style-name="T1">NE</text:span> corner (upper right corner) and its rotated mirror in the <text:span text:style-name="T1">SW</text:span> zone (lower left corner).</text:p>
        </text:list-item>
      </text:list>
      <text:p text:style-name="First_20_paragraph">The mirror positions (N and SW) make the card readable in a fan, regardless of orientation in hand.</text:p>
      <text:p text:style-name="Text_20_body">The DECK# vocabulary comprises seven glyph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Glyph</text:p>
            </table:table-cell>
            <table:table-cell table:style-name="TableHeaderRowCell" office:value-type="string">
              <text:p text:style-name="Table_20_Heading">How to draw i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•</text:span> dot</text:p>
          </table:table-cell>
          <table:table-cell table:style-name="TableRowCell" office:value-type="string">
            <text:p text:style-name="Table_20_Contents">a single dot</text:p>
          </table:table-cell>
        </table:table-row>
        <table:table-row>
          <table:table-cell table:style-name="TableRowCell" office:value-type="string">
            <text:p text:style-name="Table_20_Contents"><text:span text:style-name="Source_Text">—</text:span> line</text:p>
          </table:table-cell>
          <table:table-cell table:style-name="TableRowCell" office:value-type="string">
            <text:p text:style-name="Table_20_Contents">a horizontal line</text:p>
          </table:table-cell>
        </table:table-row>
        <table:table-row>
          <table:table-cell table:style-name="TableRowCell" office:value-type="string">
            <text:p text:style-name="Table_20_Contents"><text:span text:style-name="Source_Text">+</text:span> cross</text:p>
          </table:table-cell>
          <table:table-cell table:style-name="TableRowCell" office:value-type="string">
            <text:p text:style-name="Table_20_Contents">two perpendicular lines</text:p>
          </table:table-cell>
        </table:table-row>
        <table:table-row>
          <table:table-cell table:style-name="TableRowCell" office:value-type="string">
            <text:p text:style-name="Table_20_Contents"><text:span text:style-name="Source_Text">×</text:span> diagonal</text:p>
          </table:table-cell>
          <table:table-cell table:style-name="TableRowCell" office:value-type="string">
            <text:p text:style-name="Table_20_Contents">two diagonal lines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△</text:span> triangle</text:p>
          </table:table-cell>
          <table:table-cell table:style-name="TableRowCell" office:value-type="string">
            <text:p text:style-name="Table_20_Contents">three strokes</text:p>
          </table:table-cell>
        </table:table-row>
        <table:table-row>
          <table:table-cell table:style-name="TableRowCell" office:value-type="string">
            <text:p text:style-name="Table_20_Contents"><text:span text:style-name="Source_Text">○</text:span> circle</text:p>
          </table:table-cell>
          <table:table-cell table:style-name="TableRowCell" office:value-type="string">
            <text:p text:style-name="Table_20_Contents">a closed ring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□</text:span> square</text:p>
          </table:table-cell>
          <table:table-cell table:style-name="TableRowCell" office:value-type="string">
            <text:p text:style-name="Table_20_Contents">four strokes</text:p>
          </table:table-cell>
        </table:table-row>
      </table:table>
      <text:p text:style-name="Horizontal_20_Line"/>
      <text:h text:style-name="Heading_20_2" text:outline-level="2"><text:bookmark-start text:name="exception-jokers"/>Exception: Jokers<text:bookmark-end text:name="exception-jokers"/></text:h>
      <text:p text:style-name="First_20_paragraph">The two Jokers receive the <text:span text:style-name="T1">quadrant marker</text:span> on the back (Phase 1, identical to the 52 standard cards) and the <text:span text:style-name="T1">orientation dot</text:span> in the SE zone (Phase 3). No connectivity markers, no primary glyph, no modifier.</text:p>
      <text:p text:style-name="Text_20_body">They are uninstantiated variables: each game decides whether and how to use them.</text:p>
      <text:p text:style-name="Horizontal_20_Line"/>
      <text:h text:style-name="Heading_20_2" text:outline-level="2"><text:bookmark-start text:name="summary-chart-per-card"/>Summary chart per card<text:bookmark-end text:name="summary-chart-per-card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Element</text:p>
            </table:table-cell>
            <table:table-cell table:style-name="TableHeaderRowCell" office:value-type="string">
              <text:p text:style-name="Table_20_Heading">Position</text:p>
            </table:table-cell>
            <table:table-cell table:style-name="TableHeaderRowCell" office:value-type="string">
              <text:p text:style-name="Table_20_Heading">52 standard cards</text:p>
            </table:table-cell>
            <table:table-cell table:style-name="TableHeaderRowCell" office:value-type="string">
              <text:p text:style-name="Table_20_Heading">2 Jokers</text:p>
            </table:table-cell>
          </table:table-row>
        </table:table-header-rows>
        <table:table-row>
          <table:table-cell table:style-name="TableRowCell" office:value-type="string">
            <text:p text:style-name="Table_20_Contents">Quadrant markers</text:p>
          </table:table-cell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Connectivity markers</text:p>
          </table:table-cell>
          <table:table-cell table:style-name="TableRowCell" office:value-type="string">
            <text:p text:style-name="Table_20_Contents">Front face edges</text:p>
          </table:table-cell>
          <table:table-cell table:style-name="TableRowCell" office:value-type="string">
            <text:p text:style-name="Table_20_Contents">✓ (from matrix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North pole dot</text:p>
          </table:table-cell>
          <table:table-cell table:style-name="TableRowCell" office:value-type="string">
            <text:p text:style-name="Table_20_Contents">SE corner front face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Primary glyph</text:p>
          </table:table-cell>
          <table:table-cell table:style-name="TableRowCell" office:value-type="string">
            <text:p text:style-name="Table_20_Contents">S + N zones front face</text:p>
          </table:table-cell>
          <table:table-cell table:style-name="TableRowCell" office:value-type="string">
            <text:p text:style-name="Table_20_Contents">✓ (from matrix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Modifier glyph</text:p>
          </table:table-cell>
          <table:table-cell table:style-name="TableRowCell" office:value-type="string">
            <text:p text:style-name="Table_20_Contents">NE + SW zones front face</text:p>
          </table:table-cell>
          <table:table-cell table:style-name="TableRowCell" office:value-type="string">
            <text:p text:style-name="Table_20_Contents">✓ (from matrix)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h text:style-name="Heading_20_2" text:outline-level="2"><text:bookmark-start text:name="how-to-read-the-annotation-matrix"/>How to read the annotation matrix<text:bookmark-end text:name="how-to-read-the-annotation-matrix"/></text:h>
      <text:p text:style-name="First_20_paragraph">The matrix lists all 54 cards with three pieces of information:</text:p>
      <text:list text:style-name="L4">
        <text:list-item>
          <text:p text:style-name="P10"><text:span text:style-name="T1">Connectivity:</text:span> open edges, in N/S/E/W notation separated by <text:span text:style-name="Source_Text">+</text:span>. Edges not listed receive the wall marker.</text:p>
        </text:list-item>
        <text:list-item>
          <text:p text:style-name="P10"><text:span text:style-name="T1">Primary:</text:span> the glyph to draw in the S zone (and its mirror in N).</text:p>
        </text:list-item>
        <text:list-item>
          <text:p text:style-name="P10"><text:span text:style-name="T1">Modifier:</text:span> the glyph to draw in the NE zone (and its mirror in SW).</text:p>
        </text:list-item>
      </text:list>
      <text:p text:style-name="First_20_paragraph">Glyph color is not in the matrix because it is always derived from suit: black for ♥/♦, red for ♣/♠.</text:p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DECK# Annotation Guide</dc:title>
    <dc:description/>
    <dc:subject/>
    <meta:keyword/>
    <dc:language>en</dc:language>
    <meta:initial-creator>Roberto Bisceglie</meta:initial-creator>
    <dc:creator>Roberto Bisceglie</dc:creator>
    <meta:creation-date>2026-07-01T07:45:40Z</meta:creation-date>
    <dc:date>2026-07-01T07:45:40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7-01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How to physically prepare your DECK# deck</meta:user-defined>
    <meta:user-defined meta:name="toc-title" meta:value-type="string">Table of contents</meta:user-defined>
    <meta:user-defined meta:name="version" meta:value-type="string">1</meta:user-defined>
  </office:meta>
</office:document-meta>
</file>