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DECK# Specification</text:p>
      <text:p text:style-name="Subtitle">Layered annotation system for standard playing card deck</text:p>
      <text:p text:style-name="Author">Roberto Bisceglie</text:p>
      <text:p text:style-name="Date">2026-07-01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e-and-scope-of-the-system"/>1. Nature and scope of the system<text:bookmark-end text:name="nature-and-scope-of-the-system"/></text:h>
      <text:p text:style-name="First_20_paragraph">DECK# is a layered annotation protocol for a standard playing card deck (52 + 2 Jokers).</text:p>
      <text:p text:style-name="Text_20_body">Its purpose is to allow anyone to build and play complex board games using materials available anywhere, at minimal cost: a standard French-suited deck and two permanent markers. No proprietary components, no dedicated materials, no dependency on specific publishers or manufacturers.</text:p>
      <text:p text:style-name="Text_20_body">DECK# is inspired by <text:span text:style-name="T1">Piecepack</text:span> — an open component system for board games designed by James Kyle in 2000 — sharing its philosophy: a standardized, open substrate on which the community freely builds games. Like Piecepack, DECK# is open source.</text:p>
      <text:p text:style-name="Text_20_body">DECK# <text:span text:style-name="T1">is not</text:span> a universal deck. It does not prescribe games, mechanics, gameplay semantics, or genres. It is an open system: it defines a shared graphic vocabulary and a physical annotation structure. Games built on DECK# use this vocabulary and assign their own meanings to it.</text:p>
      <text:p text:style-name="Text_20_body">The standard deck carries three pre-existing information axes that DECK# recognizes as <text:span text:style-name="T1">active and untouchable</text:span>. Annotation adds information the card does not already have; it does not replace what is already there.</text:p>
      <text:p text:style-name="Text_20_body">DECK# is language-agnostic. The entire graphic vocabulary consists of geometric glyphs and Arabic numerals. No text is necessary or permitted in annotations.</text:p>
      <text:h text:style-name="Heading_20_3" text:outline-level="3"><text:bookmark-start text:name="out-of-scope"/>Out of scope<text:bookmark-end text:name="out-of-scope"/></text:h>
      <text:p text:style-name="First_20_paragraph">The following elements are explicitly out of scope and delegated to individual games:</text:p>
      <text:list text:style-name="L1">
        <text:list-item>
          <text:p text:style-name="P1">The meaning of suits</text:p>
        </text:list-item>
        <text:list-item>
          <text:p text:style-name="P1">The meaning of the inherited red/black color axis</text:p>
        </text:list-item>
        <text:list-item>
          <text:p text:style-name="P1">The meaning of numeric ranks</text:p>
        </text:list-item>
        <text:list-item>
          <text:p text:style-name="P1">The meaning of each glyph (the vocabulary is shared; the semantics are not)</text:p>
        </text:list-item>
        <text:list-item>
          <text:p text:style-name="P1">The rank → mechanical function mapping (e.g., A–6 = space, 7–10 = resource)</text:p>
        </text:list-item>
        <text:list-item>
          <text:p text:style-name="P1">Movement rules and grid topology</text:p>
        </text:list-item>
        <text:list-item>
          <text:p text:style-name="P1">Resolution, combat, and interaction mechanics</text:p>
        </text:list-item>
        <text:list-item>
          <text:p text:style-name="P1">Economy and resource mechanics</text:p>
        </text:list-item>
        <text:list-item>
          <text:p text:style-name="P1">Wildcard activation conditions</text:p>
        </text:list-item>
        <text:list-item>
          <text:p text:style-name="P1">Victory conditions and scenario objectives</text:p>
        </text:list-item>
        <text:list-item>
          <text:p text:style-name="P1">Oracle mechanics for solo or cooperative play</text:p>
        </text:list-item>
        <text:list-item>
          <text:p text:style-name="P1">How many cards are used</text:p>
        </text:list-item>
        <text:list-item>
          <text:p text:style-name="P1">How cards are dealt</text:p>
        </text:list-item>
        <text:list-item>
          <text:p text:style-name="P1">The number of players</text:p>
        </text:list-item>
      </text:list>
      <text:h text:style-name="Heading_20_2" text:outline-level="2"><text:bookmark-start text:name="design-principles"/>2. Design principles<text:bookmark-end text:name="design-principles"/></text:h>
      <text:list text:style-name="L2">
        <text:list-item>
          <text:p text:style-name="P2"><text:span text:style-name="T1">Material accessibility:</text:span> the only physical requirement is a standard French-suited deck and two permanent markers (black and red). Materials available anywhere, with no proprietary or dedicated components.</text:p>
        </text:list-item>
        <text:list-item>
          <text:p text:style-name="P2"><text:span text:style-name="T1">Additive, non-destructive:</text:span> annotations add structural information without overwriting the inherited substrate.</text:p>
        </text:list-item>
        <text:list-item>
          <text:p text:style-name="P2"><text:span text:style-name="T1">Language-agnostic:</text:span> no text or letters. Only geometric glyphs and Arabic numerals.</text:p>
        </text:list-item>
        <text:list-item>
          <text:p text:style-name="P2"><text:span text:style-name="T1">Color constraint:</text:span> only black and red markers.</text:p>
        </text:list-item>
        <text:list-item>
          <text:p text:style-name="P2"><text:span text:style-name="T1">Dual use:</text:span> cards are valid both as hidden information held in hand and as physical components laid on the table.</text:p>
        </text:list-item>
        <text:list-item>
          <text:p text:style-name="P2"><text:span text:style-name="T1">Back reserved for quadrant markers:</text:span> the back of the 52 standard cards receives only quadrant markers — identical on all cards, therefore carrying no differential information. No other annotations on the back. Uniformity preserves the anonymity of face-down cards.</text:p>
        </text:list-item>
        <text:list-item>
          <text:p text:style-name="P2"><text:span text:style-name="T1">Complete artifact:</text:span> the DECK# deck is fully annotated before any play session. Structural annotation is permanent and fixed. Variable states are tracked with physical tokens, not annotations.</text:p>
        </text:list-item>
      </text:list>
      <text:h text:style-name="Heading_20_2" text:outline-level="2"><text:bookmark-start text:name="the-inherited-substrate"/>3. The inherited substrate<text:bookmark-end text:name="the-inherited-substrate"/></text:h>
      <text:h text:style-name="Heading_20_3" text:outline-level="3"><text:bookmark-start text:name="the-three-axes"/>3.1 The three axes<text:bookmark-end text:name="the-three-axe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xis</text:p>
            </table:table-cell>
            <table:table-cell table:style-name="TableHeaderRowCell" office:value-type="string">
              <text:p text:style-name="Table_20_Heading">Values</text:p>
            </table:table-cell>
            <table:table-cell table:style-name="TableHeaderRowCell" office:value-type="string">
              <text:p text:style-name="Table_20_Heading">Nature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</text:p>
          </table:table-cell>
          <table:table-cell table:style-name="TableRowCell" office:value-type="string">
            <text:p text:style-name="Table_20_Contents">Red / Black</text:p>
          </table:table-cell>
          <table:table-cell table:style-name="TableRowCell" office:value-type="string">
            <text:p text:style-name="Table_20_Contents">Binary</text:p>
          </table:table-cell>
        </table:table-row>
        <table:table-row>
          <table:table-cell table:style-name="TableRowCell" office:value-type="string">
            <text:p text:style-name="Table_20_Contents">Suit polarity</text:p>
          </table:table-cell>
          <table:table-cell table:style-name="TableRowCell" office:value-type="string">
            <text:p text:style-name="Table_20_Contents">Hearts vs Diamonds (red) — Clubs vs Spades (black)</text:p>
          </table:table-cell>
          <table:table-cell table:style-name="TableRowCell" office:value-type="string">
            <text:p text:style-name="Table_20_Contents">Binary within color</text:p>
          </table:table-cell>
        </table:table-row>
        <table:table-row>
          <table:table-cell table:style-name="TableRowCell" office:value-type="string">
            <text:p text:style-name="Table_20_Contents">Rank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Ordinal scale, 13 degrees</text:p>
          </table:table-cell>
        </table:table-row>
      </table:table>
      <text:p text:style-name="First_20_paragraph">These axes are immutable. Each game decides how to map them to game concepts; they cannot be physically redefined on the card.</text:p>
      <text:h text:style-name="Heading_20_3" text:outline-level="3"><text:bookmark-start text:name="notes-on-the-substrate"/>3.2 Notes on the substrate<text:bookmark-end text:name="notes-on-the-substrate"/></text:h>
      <text:list text:style-name="L3">
        <text:list-item>
          <text:p text:style-name="P3">Face cards (J, Q, K) form a subclass of the ordinal rank. Some games may treat them as a separate category.</text:p>
        </text:list-item>
        <text:list-item>
          <text:p text:style-name="P3">The Joker belongs to none of the three axes. It is structurally outside the system by definition. See section 7.</text:p>
        </text:list-item>
        <text:list-item>
          <text:p text:style-name="P3">The card back is a surface excluded from annotation. See Principle 5 (section 2).</text:p>
        </text:list-item>
      </text:list>
      <text:h text:style-name="Heading_20_2" text:outline-level="2"><text:bookmark-start text:name="the-graphic-vocabulary"/>4. The graphic vocabulary<text:bookmark-end text:name="the-graphic-vocabulary"/></text:h>
      <text:h text:style-name="Heading_20_3" text:outline-level="3"><text:bookmark-start text:name="principles"/>4.1 Principles<text:bookmark-end text:name="principles"/></text:h>
      <text:list text:style-name="L4">
        <text:list-item>
          <text:p text:style-name="P4">All glyphs can be drawn with a few strokes by anyone, without artistic skill.</text:p>
        </text:list-item>
        <text:list-item>
          <text:p text:style-name="P4">The only additional chromatic resource is the red marker. Black is the default color.</text:p>
        </text:list-item>
        <text:list-item>
          <text:p text:style-name="P4">No text. No glyph that references any specific alphabet.</text:p>
        </text:list-item>
        <text:list-item>
          <text:p text:style-name="P4">Glyphs must not be visually confused with the existing suits.</text:p>
        </text:list-item>
      </text:list>
      <text:h text:style-name="Heading_20_3" text:outline-level="3"><text:bookmark-start text:name="primary-glyphs"/>4.2 Primary glyphs<text:bookmark-end text:name="primary-glyph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Strokes</text:p>
            </table:table-cell>
            <table:table-cell table:style-name="TableHeaderRowCell" office:value-type="string">
              <text:p text:style-name="Table_20_Heading">Natural semantics (not prescribed)</text:p>
            </table:table-cell>
          </table:table-row>
        </table:table-header-rows>
        <table:table-row>
          <table:table-cell table:style-name="TableRowCell" office:value-type="string">
            <text:p text:style-name="Table_20_Contents">• do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ce, activation, marker</text:p>
          </table:table-cell>
        </table:table-row>
        <table:table-row>
          <table:table-cell table:style-name="TableRowCell" office:value-type="string">
            <text:p text:style-name="Table_20_Contents">— lin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edge, separation, threshold</text:p>
          </table:table-cell>
        </table:table-row>
        <table:table-row>
          <table:table-cell table:style-name="TableRowCell" office:value-type="string">
            <text:p text:style-name="Table_20_Contents">+ cross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ction, crossing, union</text:p>
          </table:table-cell>
        </table:table-row>
        <table:table-row>
          <table:table-cell table:style-name="TableRowCell" office:value-type="string">
            <text:p text:style-name="Table_20_Contents">× diagonal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tion, block, exclusion</text:p>
          </table:table-cell>
        </table:table-row>
        <table:table-row>
          <table:table-cell table:style-name="TableRowCell" office:value-type="string">
            <text:p text:style-name="Table_20_Contents">△ triangle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ction, hierarchy, gradient</text:p>
          </table:table-cell>
        </table:table-row>
        <table:table-row>
          <table:table-cell table:style-name="TableRowCell" office:value-type="string">
            <text:p text:style-name="Table_20_Contents">○ circle</text:p>
          </table:table-cell>
          <table:table-cell table:style-name="TableRowCell" office:value-type="string">
            <text:p text:style-name="Table_20_Contents">1 curved</text:p>
          </table:table-cell>
          <table:table-cell table:style-name="TableRowCell" office:value-type="string">
            <text:p text:style-name="Table_20_Contents">cycle, containment, neutral state</text:p>
          </table:table-cell>
        </table:table-row>
        <table:table-row>
          <table:table-cell table:style-name="TableRowCell" office:value-type="string">
            <text:p text:style-name="Table_20_Contents">□ square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e, region, closed space</text:p>
          </table:table-cell>
        </table:table-row>
      </table:table>
      <text:p text:style-name="First_20_paragraph">Seven glyphs. The “natural semantics” column suggests intuitive associations; it does not prescribe them.</text:p>
      <text:h text:style-name="Heading_20_3" text:outline-level="3"><text:bookmark-start text:name="glyph-color-contrasting-rule"/>4.3 Glyph color — contrasting rule<text:bookmark-end text:name="glyph-color-contrasting-rule"/></text:h>
      <text:p text:style-name="First_20_paragraph">Primary and modifier glyphs are drawn in the <text:span text:style-name="T1">contrasting</text:span> color relative to the card’s suit:</text:p>
      <text:list text:style-name="L5">
        <text:list-item>
          <text:p text:style-name="P5">Red cards (♥ ♦): glyphs in <text:span text:style-name="T1">black</text:span></text:p>
        </text:list-item>
        <text:list-item>
          <text:p text:style-name="P5">Black cards (♣ ♠): glyphs in <text:span text:style-name="T1">red</text:span></text:p>
        </text:list-item>
      </text:list>
      <text:p text:style-name="First_20_paragraph">This rule ensures clear visual separation between annotation and substrate on all cards. The glyph color is entirely derivable from suit — it adds no differential information but maximizes legibility.</text:p>
      <text:h text:style-name="Heading_20_3" text:outline-level="3"><text:bookmark-start text:name="numeric-glyphs"/>4.4 Numeric glyphs<text:bookmark-end text:name="numeric-glyphs"/></text:h>
      <text:p text:style-name="First_20_paragraph">Digits 0–9 (Arabic) may be used in annotatable zones as quantities, levels, or counters. They combine with color following the same logic as primary glyphs.</text:p>
      <text:h text:style-name="Heading_20_3" text:outline-level="3"><text:bookmark-start text:name="visual-conflicts-to-avoid"/>4.5 Visual conflicts to avoid<text:bookmark-end text:name="visual-conflicts-to-avoid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Reserved shape</text:p>
            </table:table-cell>
          </table:table-row>
        </table:table-header-rows>
        <table:table-row>
          <table:table-cell table:style-name="TableRowCell" office:value-type="string">
            <text:p text:style-name="Table_20_Contents">Hearts</text:p>
          </table:table-cell>
          <table:table-cell table:style-name="TableRowCell" office:value-type="string">
            <text:p text:style-name="Table_20_Contents">Heart shape</text:p>
          </table:table-cell>
        </table:table-row>
        <table:table-row>
          <table:table-cell table:style-name="TableRowCell" office:value-type="string">
            <text:p text:style-name="Table_20_Contents">Diamonds</text:p>
          </table:table-cell>
          <table:table-cell table:style-name="TableRowCell" office:value-type="string">
            <text:p text:style-name="Table_20_Contents">Full or empty diamond</text:p>
          </table:table-cell>
        </table:table-row>
        <table:table-row>
          <table:table-cell table:style-name="TableRowCell" office:value-type="string">
            <text:p text:style-name="Table_20_Contents">Clubs</text:p>
          </table:table-cell>
          <table:table-cell table:style-name="TableRowCell" office:value-type="string">
            <text:p text:style-name="Table_20_Contents">Trefoil / three-lobed shape</text:p>
          </table:table-cell>
        </table:table-row>
        <table:table-row>
          <table:table-cell table:style-name="TableRowCell" office:value-type="string">
            <text:p text:style-name="Table_20_Contents">Spades</text:p>
          </table:table-cell>
          <table:table-cell table:style-name="TableRowCell" office:value-type="string">
            <text:p text:style-name="Table_20_Contents">Spade / inverted heart with stem</text:p>
          </table:table-cell>
        </table:table-row>
      </table:table>
      <text:p text:style-name="First_20_paragraph">The square □ and circle ○ do not conflict with any suit. The triangle △ is safe if drawn small and in a corner position.</text:p>
      <text:h text:style-name="Heading_20_2" text:outline-level="2"><text:bookmark-start text:name="annotatable-zones"/>5. Annotatable zones<text:bookmark-end text:name="annotatable-zones"/></text:h>
      <text:p text:style-name="P6">[NW] ----[N]---- [NE]</text:p>
      <text:p text:style-name="P7"><text:s text:c="2"/>| <text:s text:c="14"/>|</text:p>
      <text:p text:style-name="P8"><text:s text:c="1"/>[W] <text:s text:c="1"/>[center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DECK# Anno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Lower middle edge (internal)</text:p>
          </table:table-cell>
          <table:table-cell table:style-name="TableRowCell" office:value-type="string">
            <text:p text:style-name="Table_20_Contents">Primary glyph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Upper middle edge (internal)</text:p>
          </table:table-cell>
          <table:table-cell table:style-name="TableRowCell" office:value-type="string">
            <text:p text:style-name="Table_20_Contents">Mirror of primary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Upper right corner</text:p>
          </table:table-cell>
          <table:table-cell table:style-name="TableRowCell" office:value-type="string">
            <text:p text:style-name="Table_20_Contents">Modifier glyph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Lower left corner</text:p>
          </table:table-cell>
          <table:table-cell table:style-name="TableRowCell" office:value-type="string">
            <text:p text:style-name="Table_20_Contents">Mirror of modifier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Lower right corner</text:p>
          </table:table-cell>
          <table:table-cell table:style-name="TableRowCell" office:value-type="string">
            <text:p text:style-name="Table_20_Contents">Orientation dot (north pole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Upper left corner</text:p>
          </table:table-cell>
          <table:table-cell table:style-name="TableRowCell" office:value-type="string">
            <text:p text:style-name="Table_20_Contents">Reserved — pre-printed index</text:p>
          </table:table-cell>
        </table:table-row>
        <table:table-row>
          <table:table-cell table:style-name="TableRowCell" office:value-type="string">
            <text:p text:style-name="Table_20_Contents">Center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t used by DECK# annotation</text:p>
          </table:table-cell>
        </table:table-row>
      </table:table>
      <text:p text:style-name="First_20_paragraph"><text:span text:style-name="T1">Physical edges:</text:span> connectivity markers occupy the external white margin of the card (~3–4 mm) — physically separate from the internal zones.</text:p>
      <text:p text:style-name="Text_20_body"><text:span text:style-name="T1">Symmetrical placement rule:</text:span> each glyph appears in two mirror positions — primary zone and mirror zone. This ensures fan readability regardless of card orientation in hand.</text:p>
      <text:p text:style-name="Text_20_body"><text:span text:style-name="T1">Note on NW:</text:span> corner partially occupied by the pre-printed index. No DECK# annotation in this zone.</text:p>
      <text:h text:style-name="Heading_20_2" text:outline-level="2"><text:bookmark-start text:name="the-spatial-system"/>6. The spatial system<text:bookmark-end text:name="the-spatial-system"/></text:h>
      <text:h text:style-name="Heading_20_3" text:outline-level="3"><text:bookmark-start text:name="the-symmetry-problem"/>6.1 The symmetry problem<text:bookmark-end text:name="the-symmetry-problem"/></text:h>
      <text:p text:style-name="First_20_paragraph">Standard cards have vertical symmetry: they read the same upside down. As soon as a game introduces spatial elements, this symmetry must be explicitly broken.</text:p>
      <text:h text:style-name="Heading_20_3" text:outline-level="3"><text:bookmark-start text:name="the-north-pole-convention"/>6.2 The north pole convention<text:bookmark-end text:name="the-north-pole-convention"/></text:h>
      <text:p text:style-name="First_20_paragraph">The north pole of a card is the side with the index in canonical position (NW at top left). Recommended practice for sessions with spatial elements: draw a small dot in the SE corner before the session begins — a corner free from printing, asymmetric with respect to the NW index.</text:p>
      <text:h text:style-name="Heading_20_3" text:outline-level="3"><text:bookmark-start text:name="edge-markers"/>6.3 Edge markers<text:bookmark-end text:name="edge-markers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king</text:p>
            </table:table-cell>
            <table:table-cell table:style-name="TableHeaderRowCell" office:value-type="string">
              <text:p text:style-name="Table_20_Heading">Structural 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Thick full-edge line</text:p>
          </table:table-cell>
          <table:table-cell table:style-name="TableRowCell" office:value-type="string">
            <text:p text:style-name="Table_20_Contents">Wall: passage closed</text:p>
          </table:table-cell>
        </table:table-row>
        <table:table-row>
          <table:table-cell table:style-name="TableRowCell" office:value-type="string">
            <text:p text:style-name="Table_20_Contents">Unmarked edge</text:p>
          </table:table-cell>
          <table:table-cell table:style-name="TableRowCell" office:value-type="string">
            <text:p text:style-name="Table_20_Contents">Open: connected, passable</text:p>
          </table:table-cell>
        </table:table-row>
        <table:table-row>
          <table:table-cell table:style-name="TableRowCell" office:value-type="string">
            <text:p text:style-name="Table_20_Contents">Dot • at edge midpoint</text:p>
          </table:table-cell>
          <table:table-cell table:style-name="TableRowCell" office:value-type="string">
            <text:p text:style-name="Table_20_Contents">Threshold: intermediate state, defined by the game</text:p>
          </table:table-cell>
        </table:table-row>
      </table:table>
      <text:p text:style-name="First_20_paragraph">When cards are placed adjacent on the table, the edges in contact are read as the interface between two spaces.</text:p>
      <text:h text:style-name="Heading_20_3" text:outline-level="3"><text:bookmark-start text:name="quadrant-markers"/>6.4 Quadrant markers<text:bookmark-end text:name="quadrant-markers"/></text:h>
      <text:p text:style-name="First_20_paragraph">Quadrant markers are found on the <text:span text:style-name="T1">back</text:span> of the 52 standard cards. They are identical on all cards — they reveal no differential information when the card is face-down.</text:p>
      <text:p text:style-name="Text_20_body">Two variants are available; the choice is left to whoever annotates the deck:</text:p>
      <text:p text:style-name="Text_20_body"><text:span text:style-name="T1">Minimal variant</text:span> — four short segments from the midpoint of each edge toward the interior, without crossing the center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Extended variant</text:span> — full cross from edge to edge (the <text:span text:style-name="Source_Text">+</text:span> from the DECK# vocabulary, applied to the back with a fixed structural function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Both variants are drawn in black. Jokers receive quadrant markers on the back — identical to those on the 52 standard cards — but receive no annotation on the front face beyond the SE dot.</text:p>
      <text:h text:style-name="Heading_20_3" text:outline-level="3"><text:bookmark-start text:name="internal-direction"/>6.5 Internal direction<text:bookmark-end text:name="internal-direction"/></text:h>
      <text:p text:style-name="First_20_paragraph">The triangle △ in a corner zone indicates direction. The orientation of the apex relative to the north pole defines the vector.</text:p>
      <text:h text:style-name="Heading_20_2" text:outline-level="2"><text:bookmark-start text:name="jokers"/>7. Jokers<text:bookmark-end text:name="jokers"/></text:h>
      <text:p text:style-name="First_20_paragraph">Jokers receive the <text:span text:style-name="T1">SE dot</text:span> (north pole) on the front face and the <text:span text:style-name="T1">quadrant markers</text:span> on the back. No other structural elements: no connectivity markers, no primary glyph, no modifier.</text:p>
      <text:p text:style-name="Text_20_body">They are <text:span text:style-name="T1">uninstantiated variables</text:span>: no pre-assigned semantics from the specification. The game decides everything. A game may use zero, one, or both Jokers.</text:p>
      <text:p text:style-name="Text_20_body">Possible uses (not prescribed): mechanical wildcard, event card, global state tracker, category Joker.</text:p>
      <text:h text:style-name="Heading_20_2" text:outline-level="2"><text:bookmark-start text:name="usage-profiles"/>8. Usage profiles<text:bookmark-end text:name="usage-profiles"/></text:h>
      <text:h text:style-name="Heading_20_3" text:outline-level="3"><text:bookmark-start text:name="base-profile"/>Base Profile<text:bookmark-end text:name="base-profile"/></text:h>
      <text:p text:style-name="First_20_paragraph">Pure card game, hand management, narrative, solo scenarios.</text:p>
      <text:p text:style-name="Text_20_body"><text:span text:style-name="T1">Components:</text:span> 1 annotated deck (52 + 2) · 1 fine-tip black permanent marker · 1 fine-tip red permanent marker.<text:line-break/>Estimated annotation time: 15–20 minutes.</text:p>
      <text:h text:style-name="Heading_20_3" text:outline-level="3"><text:bookmark-start text:name="extended-profile"/>Extended Profile<text:bookmark-end text:name="extended-profile"/></text:h>
      <text:p text:style-name="First_20_paragraph">Tactical grid game, dungeon crawler, skirmish, wargame.</text:p>
      <text:p text:style-name="Text_20_body"><text:span text:style-name="T1">Additional components:</text:span> 6 d6 dice · 12 tokens in 4 distinct groups (3 per group; replaceable with coins, cubes, or any distinguishable objects).</text:p>
      <text:p text:style-name="Text_20_body">Dice use: 2d6 for resolution, up to 4d6 as counters on a card. Token use: placed on cards to represent entities without covering annotations.</text:p>
      <text:h text:style-name="Heading_20_2" text:outline-level="2"><text:bookmark-start text:name="card-usage-modes"/>9. Card usage modes<text:bookmark-end text:name="card-usage-modes"/></text:h>
      <text:h text:style-name="Heading_20_3" text:outline-level="3"><text:bookmark-start text:name="tile-mode"/>9.1 Tile mode<text:bookmark-end text:name="tile-mode"/></text:h>
      <text:p text:style-name="First_20_paragraph">Card face-up on the table, visible to all, fixed position. Spatial elements active.</text:p>
      <text:h text:style-name="Heading_20_3" text:outline-level="3"><text:bookmark-start text:name="hand-mode"/>9.2 Hand mode<text:bookmark-end text:name="hand-mode"/></text:h>
      <text:p text:style-name="First_20_paragraph">Card in hand, hidden. Spatial elements generally inactive. Annotations must follow the symmetrical placement rule (section 5).</text:p>
      <text:h text:style-name="Heading_20_3" text:outline-level="3"><text:bookmark-start text:name="hand-tile-transition"/>9.3 Hand → tile transition<text:bookmark-end text:name="hand-tile-transition"/></text:h>
      <text:p text:style-name="First_20_paragraph">The game must specify:</text:p>
      <text:list text:style-name="L6">
        <text:list-item>
          <text:p text:style-name="P17">Whether the card is placed face-down or face-up</text:p>
        </text:list-item>
        <text:list-item>
          <text:p text:style-name="P17">Whether orientation (north pole) is chosen by the player or fixed</text:p>
        </text:list-item>
        <text:list-item>
          <text:p text:style-name="P17">Whether spatial annotations become active immediately or at a later point</text:p>
        </text:list-item>
      </text:list>
      <text:h text:style-name="Heading_20_3" text:outline-level="3"><text:bookmark-start text:name="annotation"/>9.4 Annotation<text:bookmark-end text:name="annotation"/></text:h>
      <text:p text:style-name="First_20_paragraph">The DECK# deck is fully annotated once, following the annotation matrix (section 13), and used across multiple sessions without modification. Structural annotation is permanent.</text:p>
      <text:p text:style-name="Text_20_body">No in-game annotation is intended for the structural layer. Variable game states are tracked exclusively with removable physical tokens (dice, tokens, coins).</text:p>
      <text:h text:style-name="Heading_20_2" text:outline-level="2"><text:bookmark-start text:name="physical-hierarchy"/>10. Physical hierarchy<text:bookmark-end text:name="physical-hierarchy"/></text:h>
      <text:p text:style-name="First_20_paragraph">The 52 standard cards have annotations on both faces. Jokers have annotations on the back and only the SE dot on the front face.</text:p>
      <text:p text:style-name="Text_20_body"><text:span text:style-name="T1">Front face (52 standard cards):</text:span></text:p>
      <text:list text:style-name="L7">
        <text:list-item>
          <text:p text:style-name="P18">Inherited substrate (original printing): always visible, never intentionally covered</text:p>
        </text:list-item>
        <text:list-item>
          <text:p text:style-name="P18">DECK# structural annotation: connectivity on physical edges, primary glyph in S/N zone, modifier in NE/SW zone, north pole dot in SE</text:p>
        </text:list-item>
        <text:list-item>
          <text:p text:style-name="P18">Physical tokens: objects placed on the card, removable</text:p>
        </text:list-item>
      </text:list>
      <text:p text:style-name="First_20_paragraph"><text:span text:style-name="T1">Back (all 54 cards):</text:span></text:p>
      <text:list text:style-name="L8">
        <text:list-item>
          <text:p text:style-name="P19">Quadrant markers (minimal or extended variant) — identical on all cards</text:p>
        </text:list-item>
      </text:list>
      <text:p text:style-name="First_20_paragraph">Structural annotation is fixed and complete. No zone on the front face holds more than one DECK# glyph at a time.</text:p>
      <text:h text:style-name="Heading_20_2" text:outline-level="2"><text:bookmark-start text:name="designer-responsibilities"/>11. Designer responsibilities<text:bookmark-end text:name="designer-responsibilities"/></text:h>
      <text:p text:style-name="First_20_paragraph">Every game built on DECK# must specify:</text:p>
      <text:list text:style-name="L9">
        <text:list-item>
          <text:p text:style-name="P20">How it maps the three inherited axes (rank, color, suit) to game concepts</text:p>
        </text:list-item>
        <text:list-item>
          <text:p text:style-name="P20">What semantics it assigns to the DECK# vocabulary glyphs (primary and modifier)</text:p>
        </text:list-item>
        <text:list-item>
          <text:p text:style-name="P20">How it interprets the spatial system: orientation, north pole, connectivity</text:p>
        </text:list-item>
        <text:list-item>
          <text:p text:style-name="P20">How it interprets the quadrant markers (present on all cards)</text:p>
        </text:list-item>
        <text:list-item>
          <text:p text:style-name="P20">Whether it uses Jokers and with what role</text:p>
        </text:list-item>
        <text:list-item>
          <text:p text:style-name="P20">Which profile is required (Base or Extended)</text:p>
        </text:list-item>
        <text:list-item>
          <text:p text:style-name="P20">What usage mode is intended and the hand → tile transition rules</text:p>
        </text:list-item>
      </text:list>
      <text:h text:style-name="Heading_20_2" text:outline-level="2"><text:bookmark-start text:name="license"/>12. License<text:bookmark-end text:name="license"/></text:h>
      <text:p text:style-name="First_20_paragraph">DECK# is released under <text:span text:style-name="T1">Creative Commons Attribution 4.0 International (CC BY 4.0)</text:span>.</text:p>
      <text:p text:style-name="Text_20_body">Anyone may use, modify, and distribute the specification and games built on it, including for commercial purposes, provided the original source is credited. Games built on DECK# are not required to release their own rulesets under the same license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annotation-matrix"/>13. Annotation matrix<text:bookmark-end text:name="annotation-matrix"/></text:h>
      <text:p text:style-name="First_20_paragraph">The matrix defines the fixed structural annotations for all 54 cards. Each card receives:</text:p>
      <text:list text:style-name="L10">
        <text:list-item>
          <text:p text:style-name="P21"><text:span text:style-name="T1">Connectivity:</text:span> open edges (others receive a wall marker). Notation: N/S/E/W separated by <text:span text:style-name="Source_Text">+</text:span>.</text:p>
        </text:list-item>
        <text:list-item>
          <text:p text:style-name="P21"><text:span text:style-name="T1">Primary:</text:span> glyph in S zone (and mirror in N zone for hand mode).</text:p>
        </text:list-item>
        <text:list-item>
          <text:p text:style-name="P21"><text:span text:style-name="T1">Modifier:</text:span> glyph in NE corner (and mirror in SW corner for hand mode).</text:p>
        </text:list-item>
      </text:list>
      <text:p text:style-name="First_20_paragraph">All 52 standard cards also receive: SE dot (north pole) and quadrant markers.<text:line-break/>Jokers receive the SE dot on the front face and quadrant markers on the back.</text:p>
      <text:p text:style-name="Text_20_body">The distribution is an authored design artifact, orthogonal to rank/suit/color by deliberate construction. Glyph color is not included as a column — it is entirely derived from suit according to the contrasting rule (section 4.3): black glyphs on ♥/♦, red glyphs on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Rank</text:p>
            </table:table-cell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Connectivity</text:p>
            </table:table-cell>
            <table:table-cell table:style-name="TableHeaderRowCell" office:value-type="string">
              <text:p text:style-name="Table_20_Heading">Primary</text:p>
            </table:table-cell>
            <table:table-cell table:style-name="TableHeaderRowCell" office:value-type="string">
              <text:p text:style-name="Table_20_Heading">Modifier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Specification</dc:title>
    <dc:description/>
    <dc:subject/>
    <meta:keyword/>
    <dc:language>en</dc:language>
    <meta:initial-creator>Roberto Bisceglie</meta:initial-creator>
    <dc:creator>Roberto Bisceglie</dc:creator>
    <meta:creation-date>2026-07-01T07:30:30Z</meta:creation-date>
    <dc:date>2026-07-01T07:30:30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7-01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Layered annotation system for standard playing card deck</meta:user-defined>
    <meta:user-defined meta:name="toc-title" meta:value-type="string">Table of contents</meta:user-defined>
    <meta:user-defined meta:name="version" meta:value-type="string">1</meta:user-defined>
  </office:meta>
</office:document-meta>
</file>